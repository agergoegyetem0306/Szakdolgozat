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adornments="Félkövér" style:font-family-generic="roman" style:font-pitch="variable"/>
    <style:font-face style:name="Times New Roman2" svg:font-family="'Times New Roman'" style:font-adornments="Normál" style:font-family-generic="roman" style:font-pitch="variable"/>
  </office:font-face-decls>
  <office:automatic-styles>
    <style:style style:name="P1" style:family="paragraph" style:parent-style-name="Text_20_body">
      <style:paragraph-properties fo:text-align="center" style:justify-single-word="false"/>
      <style:text-properties officeooo:paragraph-rsid="000a2833"/>
    </style:style>
    <style:style style:name="P2" style:family="paragraph" style:parent-style-name="Text_20_body">
      <style:paragraph-properties fo:text-align="center" style:justify-single-word="false"/>
      <style:text-properties officeooo:paragraph-rsid="000a3c86"/>
    </style:style>
    <style:style style:name="P3" style:family="paragraph" style:parent-style-name="Text_20_body">
      <style:paragraph-properties fo:margin-top="0cm" fo:margin-bottom="0.046cm" style:contextual-spacing="false" fo:text-align="left" style:justify-single-word="false">
        <style:tab-stops>
          <style:tab-stop style:position="10.583cm"/>
        </style:tab-stops>
      </style:paragraph-properties>
      <style:text-properties officeooo:paragraph-rsid="000c9068"/>
    </style:style>
    <style:style style:name="P4" style:family="paragraph" style:parent-style-name="Text_20_body">
      <style:paragraph-properties fo:text-align="left" style:justify-single-word="false">
        <style:tab-stops>
          <style:tab-stop style:position="10.583cm"/>
        </style:tab-stops>
      </style:paragraph-properties>
      <style:text-properties officeooo:paragraph-rsid="000c9068"/>
    </style:style>
    <style:style style:name="P5" style:family="paragraph" style:parent-style-name="Contents_20_1">
      <style:paragraph-properties>
        <style:tab-stops>
          <style:tab-stop style:position="15.998cm" style:type="right" style:leader-style="dotted" style:leader-text="."/>
        </style:tab-stops>
      </style:paragraph-properties>
    </style:style>
    <style:style style:name="P6" style:family="paragraph" style:parent-style-name="Contents_20_2">
      <style:paragraph-properties>
        <style:tab-stops>
          <style:tab-stop style:position="15.499cm" style:type="right" style:leader-style="dotted" style:leader-text="."/>
        </style:tab-stops>
      </style:paragraph-properties>
    </style:style>
    <style:style style:name="P7" style:family="paragraph" style:parent-style-name="Bekezdes">
      <style:paragraph-properties style:writing-mode="lr-tb"/>
    </style:style>
    <style:style style:name="P8" style:family="paragraph" style:parent-style-name="Bekezdes">
      <style:paragraph-properties style:writing-mode="lr-tb"/>
      <style:text-properties officeooo:paragraph-rsid="00141f38"/>
    </style:style>
    <style:style style:name="P9" style:family="paragraph" style:parent-style-name="Bekezdes">
      <style:paragraph-properties style:writing-mode="lr-tb"/>
      <style:text-properties officeooo:paragraph-rsid="0018e06a"/>
    </style:style>
    <style:style style:name="P10" style:family="paragraph" style:parent-style-name="Bekezdes">
      <style:paragraph-properties style:writing-mode="lr-tb"/>
      <style:text-properties officeooo:paragraph-rsid="0019a954"/>
    </style:style>
    <style:style style:name="P11" style:family="paragraph" style:parent-style-name="Bekezdes">
      <style:text-properties officeooo:paragraph-rsid="001ff44d"/>
    </style:style>
    <style:style style:name="P12" style:family="paragraph" style:parent-style-name="Text_20_body">
      <style:paragraph-properties fo:line-height="150%" fo:text-align="justify" style:justify-single-word="false"/>
      <style:text-properties fo:color="#000000" loext:opacity="100%" style:font-name="Times New Roman"/>
    </style:style>
    <style:style style:name="P13" style:family="paragraph" style:parent-style-name="Bekezdes">
      <style:text-properties officeooo:paragraph-rsid="0030fc7a"/>
    </style:style>
    <style:style style:name="T1" style:family="text">
      <style:text-properties style:font-name="Times New Roman" fo:font-size="24pt" officeooo:rsid="000a2833" style:font-size-asian="24pt" style:font-size-complex="24pt"/>
    </style:style>
    <style:style style:name="T2" style:family="text">
      <style:text-properties style:font-name="Times New Roman" fo:font-size="24pt" fo:font-weight="normal" officeooo:rsid="000a3c86" style:font-size-asian="24pt" style:font-weight-asian="normal" style:font-size-complex="24pt" style:font-weight-complex="normal"/>
    </style:style>
    <style:style style:name="T3" style:family="text">
      <style:text-properties style:font-name="Times New Roman" fo:font-size="20pt" fo:font-weight="normal" officeooo:rsid="000c9068" style:font-size-asian="20pt" style:font-weight-asian="normal" style:font-size-complex="20pt" style:font-weight-complex="normal"/>
    </style:style>
    <style:style style:name="T4" style:family="text">
      <style:text-properties officeooo:rsid="003e4b60"/>
    </style:style>
    <style:style style:name="T5" style:family="text">
      <style:text-properties officeooo:rsid="0013641e"/>
    </style:style>
    <style:style style:name="T6" style:family="text">
      <style:text-properties officeooo:rsid="001dd959"/>
    </style:style>
    <style:style style:name="T7" style:family="text">
      <style:text-properties officeooo:rsid="0020fae1"/>
    </style:style>
    <style:style style:name="T8" style:family="text">
      <style:text-properties officeooo:rsid="0022f203"/>
    </style:style>
    <style:style style:name="T9" style:family="text">
      <style:text-properties fo:font-size="13pt" fo:font-weight="bold" officeooo:rsid="001ff44d" style:font-size-asian="11.3500003814697pt" style:font-weight-asian="bold" style:font-size-complex="13pt" style:font-weight-complex="bold"/>
    </style:style>
    <style:style style:name="T10" style:family="text">
      <style:text-properties officeooo:rsid="002311a6"/>
    </style:style>
    <style:style style:name="T11" style:family="text">
      <style:text-properties officeooo:rsid="00255a52"/>
    </style:style>
    <style:style style:name="T12" style:family="text">
      <style:text-properties officeooo:rsid="00258b61"/>
    </style:style>
    <style:style style:name="T13" style:family="text">
      <style:text-properties officeooo:rsid="00262e57"/>
    </style:style>
    <style:style style:name="T14" style:family="text">
      <style:text-properties fo:font-size="13pt" fo:font-weight="bold" officeooo:rsid="00264397" style:font-size-asian="11.3500003814697pt" style:font-weight-asian="bold" style:font-size-complex="13pt" style:font-weight-complex="bold"/>
    </style:style>
    <style:style style:name="T15" style:family="text">
      <style:text-properties officeooo:rsid="002c123a"/>
    </style:style>
    <style:style style:name="T16" style:family="text">
      <style:text-properties officeooo:rsid="002a1ad6"/>
    </style:style>
    <style:style style:name="T17" style:family="text">
      <style:text-properties officeooo:rsid="0027e72a"/>
    </style:style>
    <style:style style:name="T18" style:family="text">
      <style:text-properties officeooo:rsid="002d32a2"/>
    </style:style>
    <style:style style:name="T19" style:family="text">
      <style:text-properties officeooo:rsid="00331237"/>
    </style:style>
    <style:style style:name="T20" style:family="text">
      <style:text-properties fo:font-size="12pt" fo:font-weight="normal" officeooo:rsid="002ce490" style:font-size-asian="10.5pt" style:font-weight-asian="normal" style:font-size-complex="12pt" style:font-weight-complex="normal"/>
    </style:style>
    <style:style style:name="T21" style:family="text">
      <style:text-properties officeooo:rsid="0030a5c1"/>
    </style:style>
    <style:style style:name="T22" style:family="text">
      <style:text-properties fo:font-size="13pt" fo:font-weight="bold" officeooo:rsid="0030fc7a" style:font-size-asian="11.3500003814697pt" style:font-weight-asian="bold" style:font-size-complex="13pt" style:font-weight-complex="bold"/>
    </style:style>
    <style:style style:name="T23" style:family="text">
      <style:text-properties style:font-name="Times New Roman"/>
    </style:style>
    <style:style style:name="T24" style:family="text">
      <style:text-properties fo:font-variant="normal" fo:text-transform="none" style:font-name="Times New Roman" fo:font-size="12pt" fo:letter-spacing="normal" fo:font-style="normal"/>
    </style:style>
    <style:style style:name="T25" style:family="text">
      <style:text-properties fo:font-variant="normal" fo:text-transform="none" style:font-name="Times New Roman" fo:font-size="12pt" fo:letter-spacing="normal" fo:font-style="normal" officeooo:rsid="00473f8f"/>
    </style:style>
    <style:style style:name="T26" style:family="text">
      <style:text-properties officeooo:rsid="004a5fbe"/>
    </style:style>
    <style:style style:name="T27" style:family="text">
      <style:text-properties officeooo:rsid="0042068e"/>
    </style:style>
    <style:style style:name="T28" style:family="text">
      <style:text-properties fo:font-style="italic" style:font-style-asian="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RefHeading___Toc15515_918428579"/><text:span text:style-name="Strong_20_Emphasis"><text:span text:style-name="T1">DEBRECENI EGYETEM<text:line-break/> INFROMATIKAI KAR</text:span></text:span><text:bookmark-end text:name="__RefHeading___Toc15515_918428579"/></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SZAKDOLGOZAT</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2"><text:span text:style-name="Strong_20_Emphasis"><text:span text:style-name="T2">Gamifikált fitness mobil alkalmazás</text:span></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3"><text:span text:style-name="Strong_20_Emphasis"><text:span text:style-name="T3"/></text:span></text:p>
      <text:p text:style-name="P3"><text:span text:style-name="Strong_20_Emphasis"><text:span text:style-name="T3">Témavezető:<text:tab/>Készítette:</text:span></text:span></text:p>
      <text:p text:style-name="P4"><text:span text:style-name="Strong_20_Emphasis"><text:span text:style-name="T3">Dr. Biró Piroska<text:tab/>Abari Gergő</text:span></text:span></text:p>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rtalomjegyzék1_Head" text:protected="true">
            <text:p text:style-name="Contents_20_Heading"><text:soft-page-break/>Tartalomjegyzék</text:p>
          </text:index-title>
          <text:p text:style-name="P5"><text:a xlink:type="simple" xlink:href="#__RefHeading___Toc15519_918428579" office:name="1. Bevezetés" text:style-name="Index_20_Link" text:visited-style-name="Index_20_Link">1. Bevezetés<text:tab/>3</text:a></text:p>
          <text:p text:style-name="P5"><text:a xlink:type="simple" xlink:href="#__RefHeading___Toc15523_918428579" office:name="2. A gamifikáció szerepe mobilalkalmazásokban" text:style-name="Index_20_Link" text:visited-style-name="Index_20_Link">2. A gamifikáció szerepe mobilalkalmazásokban<text:tab/>5</text:a></text:p>
          <text:p text:style-name="P6"><text:a xlink:type="simple" xlink:href="#__RefHeading___Toc15525_918428579" office:name="2.1. A gamifikáció fogalma és alapjai" text:style-name="Index_20_Link" text:visited-style-name="Index_20_Link">2.1. A gamifikáció fogalma és alapjai<text:tab/>5</text:a></text:p>
          <text:p text:style-name="P6"><text:a xlink:type="simple" xlink:href="#__RefHeading___Toc15527_918428579" office:name="2.2. A gamifikáció játékelemei és mechanizmusai" text:style-name="Index_20_Link" text:visited-style-name="Index_20_Link">2.2. A gamifikáció játékelemei és mechanizmusai<text:tab/>6</text:a></text:p>
          <text:p text:style-name="P6"><text:a xlink:type="simple" xlink:href="#__RefHeading___Toc15529_918428579" office:name="2.3. A gamifikáció hatásossága a különböző alkalmazási területeken" text:style-name="Index_20_Link" text:visited-style-name="Index_20_Link">2.3. A gamifikáció hatásossága a különböző alkalmazási területeken<text:tab/>6</text:a></text:p>
          <text:p text:style-name="P6"><text:a xlink:type="simple" xlink:href="#__RefHeading___Toc15531_918428579" office:name="2.4. A gamifikáció korlátai és kritikái" text:style-name="Index_20_Link" text:visited-style-name="Index_20_Link">2.4. A gamifikáció korlátai és kritikái<text:tab/>7</text:a></text:p>
          <text:p text:style-name="P6"><text:a xlink:type="simple" xlink:href="#__RefHeading___Toc15533_918428579" office:name="2.5. Összegzés" text:style-name="Index_20_Link" text:visited-style-name="Index_20_Link">2.5. Összegzés<text:tab/>8</text:a></text:p>
          <text:p text:style-name="P5"><text:a xlink:type="simple" xlink:href="#__RefHeading___Toc15535_918428579" office:name="3. A fejlesztői környezet és technológiák" text:style-name="Index_20_Link" text:visited-style-name="Index_20_Link">3. A fejlesztői környezet és technológiák<text:tab/>10</text:a></text:p>
          <text:p text:style-name="P6"><text:a xlink:type="simple" xlink:href="#__RefHeading___Toc24868_918428579" office:name="3.1. A fejlesztői környezet áttekintése" text:style-name="Index_20_Link" text:visited-style-name="Index_20_Link">3.1. A fejlesztői környezet áttekintése<text:tab/>10</text:a></text:p>
          <text:p text:style-name="P6"><text:a xlink:type="simple" xlink:href="#__RefHeading___Toc24870_918428579" office:name="3.2. Backend fejlesztői környezet - PhpStorm" text:style-name="Index_20_Link" text:visited-style-name="Index_20_Link">3.2. Backend fejlesztői környezet - PhpStorm<text:tab/>11</text:a></text:p>
          <text:p text:style-name="P6"><text:a xlink:type="simple" xlink:href="#__RefHeading___Toc24872_918428579" office:name="3.3. PHP programozási nyelv" text:style-name="Index_20_Link" text:visited-style-name="Index_20_Link">3.3. PHP programozási nyelv<text:tab/>11</text:a></text:p>
          <text:p text:style-name="P6"><text:a xlink:type="simple" xlink:href="#__RefHeading___Toc24874_918428579" office:name="3.4. Laravel keretrendszer" text:style-name="Index_20_Link" text:visited-style-name="Index_20_Link">3.4. Laravel keretrendszer<text:tab/>11</text:a></text:p>
          <text:p text:style-name="P6"><text:a xlink:type="simple" xlink:href="#__RefHeading___Toc24876_918428579" office:name="3.5. Hitelesítés és biztonság" text:style-name="Index_20_Link" text:visited-style-name="Index_20_Link">3.5. Hitelesítés és biztonság<text:tab/>11</text:a></text:p>
          <text:p text:style-name="P6"><text:a xlink:type="simple" xlink:href="#__RefHeading___Toc24878_918428579" office:name="3.6. Adatbázis - MySQL" text:style-name="Index_20_Link" text:visited-style-name="Index_20_Link">3.6. Adatbázis - MySQL<text:tab/>11</text:a></text:p>
          <text:p text:style-name="P6"><text:a xlink:type="simple" xlink:href="#__RefHeading___Toc24880_918428579" office:name="3.7. Frontend fejlesztői környezet – Android Studio" text:style-name="Index_20_Link" text:visited-style-name="Index_20_Link">3.7. Frontend fejlesztői környezet – Android Studio<text:tab/>11</text:a></text:p>
          <text:p text:style-name="P6"><text:a xlink:type="simple" xlink:href="#__RefHeading___Toc24882_918428579" office:name="3.8. Kotlin programozási nyelv" text:style-name="Index_20_Link" text:visited-style-name="Index_20_Link">3.8. Kotlin programozási nyelv<text:tab/>11</text:a></text:p>
          <text:p text:style-name="P6"><text:a xlink:type="simple" xlink:href="#__RefHeading___Toc24884_918428579" office:name="3.9. Jetpack Compose" text:style-name="Index_20_Link" text:visited-style-name="Index_20_Link">3.9. Jetpack Compose<text:tab/>11</text:a></text:p>
          <text:p text:style-name="P6"><text:a xlink:type="simple" xlink:href="#__RefHeading___Toc24886_918428579" office:name="3.10. Hálózati kommunikáció" text:style-name="Index_20_Link" text:visited-style-name="Index_20_Link">3.10. Hálózati kommunikáció<text:tab/>11</text:a></text:p>
          <text:p text:style-name="P6"><text:a xlink:type="simple" xlink:href="#__RefHeading___Toc24888_918428579" office:name="3.11. A rendszer architektúrájának összefoglalása" text:style-name="Index_20_Link" text:visited-style-name="Index_20_Link">3.11. A rendszer architektúrájának összefoglalása<text:tab/>11</text:a></text:p>
          <text:p text:style-name="P5"><text:a xlink:type="simple" xlink:href="#__RefHeading___Toc21098_918428579" office:name="4. A LvlUp! mobilalkalmazás bemutatása" text:style-name="Index_20_Link" text:visited-style-name="Index_20_Link">4. A LvlUp! mobilalkalmazás bemutatása<text:tab/>12</text:a></text:p>
          <text:p text:style-name="P5"><text:a xlink:type="simple" xlink:href="#__RefHeading___Toc15537_918428579" office:name="5. Összefoglalás" text:style-name="Index_20_Link" text:visited-style-name="Index_20_Link">5. Összefoglalás<text:tab/>13</text:a></text:p>
          <text:p text:style-name="P5"><text:a xlink:type="simple" xlink:href="#__RefHeading___Toc15539_918428579" office:name="Irodalomjegyzék" text:style-name="Index_20_Link" text:visited-style-name="Index_20_Link">Irodalomjegyzék<text:tab/>14</text:a></text:p>
        </text:index-body>
      </text:table-of-content>
      <text:p text:style-name="Bekezdes"><text:span text:style-name="Strong_20_Emphasis"/></text:p>
      <text:h text:style-name="Heading_20_1" text:outline-level="1"><text:bookmark-start text:name="__RefHeading___Toc15519_918428579"/><text:span text:style-name="Strong_20_Emphasis"><text:span text:style-name="T4">1. </text:span></text:span><text:span text:style-name="Strong_20_Emphasis">Bevezetés</text:span><text:bookmark-end text:name="__RefHeading___Toc15519_918428579"/></text:h>
      <text:p text:style-name="P7">Napjainkban az egészséges életmód iránti érdeklődés folyamatosan növekszik. Számos kezdeményezés irányul arra, hogy valamilyen módon ösztönözzön másokat, hogy úgy éljék életüket, hogy fizikailag a legtöbbet hozzák ki magukból. A modern társadalom életvitele azonban számos olyan tényezőt hordoz magában, amelyek megnehezítik ennek gyakorlati megvalósítását. Az ülő életmód elterjedése, a rendszertelen táplálkozás, valamint a mindennapi stressz hozzájárulnak ahhoz, hogy az emberek nehezen alakítsanak ki hosszú távon fenntartható, egészségtudatos szokásokat. Az ülő életmód egészségügyi kockázata globális szinten is jelentős: egy 168 országra kiterjedő vizsgálat szerint a fizikai inaktivitás a teljes halálozás mintegy 7,2%-ához járul hozzá <text:reference-mark-start text:name="ZOTERO_ITEM CSL_CITATION {&quot;citationID&quot;:&quot;6NIxyx1N&quot;,&quot;properties&quot;:{&quot;unsorted&quot;:false,&quot;formattedCitation&quot;:&quot;[1]&quot;,&quot;plainCitation&quot;:&quot;[1]&quot;,&quot;noteIndex&quot;:0},&quot;citationItems&quot;:[{&quot;id&quot;:4,&quot;uris&quot;:[&quot;http://zotero.org/users/local/Joc9xhOC/items/3SFTEZAX&quot;],&quot;itemData&quot;:{&quot;id&quot;:4,&quot;type&quot;:&quot;article-journal&quot;,&quot;abstract&quot;:&quot;Objectives\n              Physical inactivity is a risk factor for premature mortality and several non-communicable diseases. The purpose of this study was to estimate the global burden associated with physical inactivity, and to examine differences by country income and region.\n            \n            \n              Methods\n              Population-level, prevalence-based population attributable risks (PAR) were calculated for 168 countries to estimate how much disease could be averted if physical inactivity were eliminated. We calculated PARs (percentage of cases attributable to inactivity) for all-cause mortality, cardiovascular disease mortality and non-communicable diseases including coronary heart disease, stroke, hypertension, type 2 diabetes, dementia, depression and cancers of the bladder, breast, colon, endometrium, oesophagus, stomach and kidney.\n            \n            \n              Results\n              Globally, 7.2% and 7.6% of all-cause and cardiovascular disease deaths, respectively, are attributable to physical inactivity. The proportions of non-communicable diseases attributable to physical inactivity range from 1.6% for hypertension to 8.1% for dementia. There was an increasing gradient across income groups; PARs were more than double in high-income compared with low-income countries. However, 69% of total deaths and 74% of cardiovascular disease deaths associated with physical inactivity are occurring in middle-income countries, given their population size. Regional differences were also observed, with the PARs occurring in Latin America/Caribbean and high-income Western and Asia-Pacific countries, and the lowest burden occurring in Oceania and East/Southeast Asia.\n            \n            \n              Conclusion\n              The global burden associated with physical inactivity is substantial. The relative burden is greatest in high-income countries; however, the greatest number of people (absolute burden) affected by physical inactivity are living in middle-income countries given the size of their populations.&quot;,&quot;container-title&quot;:&quot;British Journal of Sports Medicine&quot;,&quot;DOI&quot;:&quot;10.1136/bjsports-2020-103640&quot;,&quot;ISSN&quot;:&quot;0306-3674, 1473-0480&quot;,&quot;issue&quot;:&quot;2&quot;,&quot;journalAbbreviation&quot;:&quot;Br J Sports Med&quot;,&quot;language&quot;:&quot;en&quot;,&quot;page&quot;:&quot;101-106&quot;,&quot;source&quot;:&quot;DOI.org (Crossref)&quot;,&quot;title&quot;:&quot;Physical inactivity and non-communicable disease burden in low-income, middle-income and high-income countries&quot;,&quot;volume&quot;:&quot;56&quot;,&quot;author&quot;:[{&quot;family&quot;:&quot;Katzmarzyk&quot;,&quot;given&quot;:&quot;Peter T&quot;},{&quot;family&quot;:&quot;Friedenreich&quot;,&quot;given&quot;:&quot;Christine&quot;},{&quot;family&quot;:&quot;Shiroma&quot;,&quot;given&quot;:&quot;Eric J&quot;},{&quot;family&quot;:&quot;Lee&quot;,&quot;given&quot;:&quot;I-Min&quot;}],&quot;issued&quot;:{&quot;date-parts&quot;:[[&quot;2022&quot;,1]]}}}],&quot;schema&quot;:&quot;https://github.com/citation-style-language/schema/raw/master/csl-citation.json&quot;} RNDJ8KQRNIf9q"/>[1]<text:reference-mark-end text:name="ZOTERO_ITEM CSL_CITATION {&quot;citationID&quot;:&quot;6NIxyx1N&quot;,&quot;properties&quot;:{&quot;unsorted&quot;:false,&quot;formattedCitation&quot;:&quot;[1]&quot;,&quot;plainCitation&quot;:&quot;[1]&quot;,&quot;noteIndex&quot;:0},&quot;citationItems&quot;:[{&quot;id&quot;:4,&quot;uris&quot;:[&quot;http://zotero.org/users/local/Joc9xhOC/items/3SFTEZAX&quot;],&quot;itemData&quot;:{&quot;id&quot;:4,&quot;type&quot;:&quot;article-journal&quot;,&quot;abstract&quot;:&quot;Objectives\n              Physical inactivity is a risk factor for premature mortality and several non-communicable diseases. The purpose of this study was to estimate the global burden associated with physical inactivity, and to examine differences by country income and region.\n            \n            \n              Methods\n              Population-level, prevalence-based population attributable risks (PAR) were calculated for 168 countries to estimate how much disease could be averted if physical inactivity were eliminated. We calculated PARs (percentage of cases attributable to inactivity) for all-cause mortality, cardiovascular disease mortality and non-communicable diseases including coronary heart disease, stroke, hypertension, type 2 diabetes, dementia, depression and cancers of the bladder, breast, colon, endometrium, oesophagus, stomach and kidney.\n            \n            \n              Results\n              Globally, 7.2% and 7.6% of all-cause and cardiovascular disease deaths, respectively, are attributable to physical inactivity. The proportions of non-communicable diseases attributable to physical inactivity range from 1.6% for hypertension to 8.1% for dementia. There was an increasing gradient across income groups; PARs were more than double in high-income compared with low-income countries. However, 69% of total deaths and 74% of cardiovascular disease deaths associated with physical inactivity are occurring in middle-income countries, given their population size. Regional differences were also observed, with the PARs occurring in Latin America/Caribbean and high-income Western and Asia-Pacific countries, and the lowest burden occurring in Oceania and East/Southeast Asia.\n            \n            \n              Conclusion\n              The global burden associated with physical inactivity is substantial. The relative burden is greatest in high-income countries; however, the greatest number of people (absolute burden) affected by physical inactivity are living in middle-income countries given the size of their populations.&quot;,&quot;container-title&quot;:&quot;British Journal of Sports Medicine&quot;,&quot;DOI&quot;:&quot;10.1136/bjsports-2020-103640&quot;,&quot;ISSN&quot;:&quot;0306-3674, 1473-0480&quot;,&quot;issue&quot;:&quot;2&quot;,&quot;journalAbbreviation&quot;:&quot;Br J Sports Med&quot;,&quot;language&quot;:&quot;en&quot;,&quot;page&quot;:&quot;101-106&quot;,&quot;source&quot;:&quot;DOI.org (Crossref)&quot;,&quot;title&quot;:&quot;Physical inactivity and non-communicable disease burden in low-income, middle-income and high-income countries&quot;,&quot;volume&quot;:&quot;56&quot;,&quot;author&quot;:[{&quot;family&quot;:&quot;Katzmarzyk&quot;,&quot;given&quot;:&quot;Peter T&quot;},{&quot;family&quot;:&quot;Friedenreich&quot;,&quot;given&quot;:&quot;Christine&quot;},{&quot;family&quot;:&quot;Shiroma&quot;,&quot;given&quot;:&quot;Eric J&quot;},{&quot;family&quot;:&quot;Lee&quot;,&quot;given&quot;:&quot;I-Min&quot;}],&quot;issued&quot;:{&quot;date-parts&quot;:[[&quot;2022&quot;,1]]}}}],&quot;schema&quot;:&quot;https://github.com/citation-style-language/schema/raw/master/csl-citation.json&quot;} RNDJ8KQRNIf9q"/>. Bár az egészséges életmóddal kapcsolatos információk széles körben elérhetők, ezek alkalmazása a mindennapi gyakorlatban gyakran elmarad. </text:p>
      <text:p text:style-name="P8">Az egészséges életmód kialakításának és fenntartásának egyik legnagyobb akadálya a motiváció hiánya. Sok esetben a kezdeti lelkesedés gyorsan alábbhagy, és az egyének visszatérnek korábbi szokásaikhoz. Bár számos módszer létezik egy ideális életmód támogatására, például edzéstervek és étrendek követése, vagy különböző motiváló alkalmazások, ezek gyakran nem biztosítanak elegendő visszajelzést vagy élményt a felhasználók számára. Ennek következtében a felhasználók érdeklődése csökken, és a kívánt változás nem válik tartóssá. A szakirodalom rámutat arra, hogy a motiváció hiánya mögött több tényező is állhat, például az a percepció, hogy a viselkedésváltozáshoz szükséges erőfeszítés meghaladja annak várható hasznát <text:span text:style-name="T5">.</text:span><text:reference-mark-start text:name="ZOTERO_ITEM CSL_CITATION {&quot;citationID&quot;:&quot;bGLqNFHs&quot;,&quot;properties&quot;:{&quot;unsorted&quot;:false,&quot;formattedCitation&quot;:&quot;[2]&quot;,&quot;plainCitation&quot;:&quot;[2]&quot;,&quot;noteIndex&quot;:0},&quot;citationItems&quot;:[{&quot;id&quot;:6,&quot;uris&quot;:[&quot;http://zotero.org/users/local/Joc9xhOC/items/CM7LSC5X&quot;],&quot;itemData&quot;:{&quot;id&quot;:6,&quot;type&quot;:&quot;article-journal&quot;,&quot;container-title&quot;:&quot;Frontiers in Psychology&quot;,&quot;DOI&quot;:&quot;10.3389/fpsyg.2015.00835&quot;,&quot;ISSN&quot;:&quot;1664-1078&quot;,&quot;journalAbbreviation&quot;:&quot;Front. Psychol.&quot;,&quot;source&quot;:&quot;DOI.org (Crossref)&quot;,&quot;title&quot;:&quot;Motivating the unmotivated: how can health behavior be changed in those unwilling to change?&quot;,&quot;title-short&quot;:&quot;Motivating the unmotivated&quot;,&quot;URL&quot;:&quot;http://journal.frontiersin.org/Article/10.3389/fpsyg.2015.00835/abstract&quot;,&quot;volume&quot;:&quot;6&quot;,&quot;author&quot;:[{&quot;family&quot;:&quot;Hardcastle&quot;,&quot;given&quot;:&quot;Sarah J.&quot;},{&quot;family&quot;:&quot;Hancox&quot;,&quot;given&quot;:&quot;Jennie&quot;},{&quot;family&quot;:&quot;Hattar&quot;,&quot;given&quot;:&quot;Anne&quot;},{&quot;family&quot;:&quot;Maxwell-Smith&quot;,&quot;given&quot;:&quot;Chloe&quot;},{&quot;family&quot;:&quot;Thøgersen-Ntoumani&quot;,&quot;given&quot;:&quot;Cecilie&quot;},{&quot;family&quot;:&quot;Hagger&quot;,&quot;given&quot;:&quot;Martin S.&quot;}],&quot;accessed&quot;:{&quot;date-parts&quot;:[[&quot;2026&quot;,3,18]]},&quot;issued&quot;:{&quot;date-parts&quot;:[[&quot;2015&quot;,6,16]]}}}],&quot;schema&quot;:&quot;https://github.com/citation-style-language/schema/raw/master/csl-citation.json&quot;} RNDAxg9xYRDfA"/><text:span text:style-name="T5">[2]</text:span><text:reference-mark-end text:name="ZOTERO_ITEM CSL_CITATION {&quot;citationID&quot;:&quot;bGLqNFHs&quot;,&quot;properties&quot;:{&quot;unsorted&quot;:false,&quot;formattedCitation&quot;:&quot;[2]&quot;,&quot;plainCitation&quot;:&quot;[2]&quot;,&quot;noteIndex&quot;:0},&quot;citationItems&quot;:[{&quot;id&quot;:6,&quot;uris&quot;:[&quot;http://zotero.org/users/local/Joc9xhOC/items/CM7LSC5X&quot;],&quot;itemData&quot;:{&quot;id&quot;:6,&quot;type&quot;:&quot;article-journal&quot;,&quot;container-title&quot;:&quot;Frontiers in Psychology&quot;,&quot;DOI&quot;:&quot;10.3389/fpsyg.2015.00835&quot;,&quot;ISSN&quot;:&quot;1664-1078&quot;,&quot;journalAbbreviation&quot;:&quot;Front. Psychol.&quot;,&quot;source&quot;:&quot;DOI.org (Crossref)&quot;,&quot;title&quot;:&quot;Motivating the unmotivated: how can health behavior be changed in those unwilling to change?&quot;,&quot;title-short&quot;:&quot;Motivating the unmotivated&quot;,&quot;URL&quot;:&quot;http://journal.frontiersin.org/Article/10.3389/fpsyg.2015.00835/abstract&quot;,&quot;volume&quot;:&quot;6&quot;,&quot;author&quot;:[{&quot;family&quot;:&quot;Hardcastle&quot;,&quot;given&quot;:&quot;Sarah J.&quot;},{&quot;family&quot;:&quot;Hancox&quot;,&quot;given&quot;:&quot;Jennie&quot;},{&quot;family&quot;:&quot;Hattar&quot;,&quot;given&quot;:&quot;Anne&quot;},{&quot;family&quot;:&quot;Maxwell-Smith&quot;,&quot;given&quot;:&quot;Chloe&quot;},{&quot;family&quot;:&quot;Thøgersen-Ntoumani&quot;,&quot;given&quot;:&quot;Cecilie&quot;},{&quot;family&quot;:&quot;Hagger&quot;,&quot;given&quot;:&quot;Martin S.&quot;}],&quot;accessed&quot;:{&quot;date-parts&quot;:[[&quot;2026&quot;,3,18]]},&quot;issued&quot;:{&quot;date-parts&quot;:[[&quot;2015&quot;,6,16]]}}}],&quot;schema&quot;:&quot;https://github.com/citation-style-language/schema/raw/master/csl-citation.json&quot;} RNDAxg9xYRDfA"/> Emellett az egyének sokszor nem képesek tudatosan felülírni a korábban kialakult, berögződött szokásaikat, ami tovább nehezíti a változást <text:reference-mark-start text:name="ZOTERO_ITEM CSL_CITATION {&quot;citationID&quot;:&quot;HAvyt9rs&quot;,&quot;properties&quot;:{&quot;unsorted&quot;:false,&quot;formattedCitation&quot;:&quot;[2]&quot;,&quot;plainCitation&quot;:&quot;[2]&quot;,&quot;noteIndex&quot;:0},&quot;citationItems&quot;:[{&quot;id&quot;:6,&quot;uris&quot;:[&quot;http://zotero.org/users/local/Joc9xhOC/items/CM7LSC5X&quot;],&quot;itemData&quot;:{&quot;id&quot;:6,&quot;type&quot;:&quot;article-journal&quot;,&quot;container-title&quot;:&quot;Frontiers in Psychology&quot;,&quot;DOI&quot;:&quot;10.3389/fpsyg.2015.00835&quot;,&quot;ISSN&quot;:&quot;1664-1078&quot;,&quot;journalAbbreviation&quot;:&quot;Front. Psychol.&quot;,&quot;source&quot;:&quot;DOI.org (Crossref)&quot;,&quot;title&quot;:&quot;Motivating the unmotivated: how can health behavior be changed in those unwilling to change?&quot;,&quot;title-short&quot;:&quot;Motivating the unmotivated&quot;,&quot;URL&quot;:&quot;http://journal.frontiersin.org/Article/10.3389/fpsyg.2015.00835/abstract&quot;,&quot;volume&quot;:&quot;6&quot;,&quot;author&quot;:[{&quot;family&quot;:&quot;Hardcastle&quot;,&quot;given&quot;:&quot;Sarah J.&quot;},{&quot;family&quot;:&quot;Hancox&quot;,&quot;given&quot;:&quot;Jennie&quot;},{&quot;family&quot;:&quot;Hattar&quot;,&quot;given&quot;:&quot;Anne&quot;},{&quot;family&quot;:&quot;Maxwell-Smith&quot;,&quot;given&quot;:&quot;Chloe&quot;},{&quot;family&quot;:&quot;Thøgersen-Ntoumani&quot;,&quot;given&quot;:&quot;Cecilie&quot;},{&quot;family&quot;:&quot;Hagger&quot;,&quot;given&quot;:&quot;Martin S.&quot;}],&quot;accessed&quot;:{&quot;date-parts&quot;:[[&quot;2026&quot;,3,18]]},&quot;issued&quot;:{&quot;date-parts&quot;:[[&quot;2015&quot;,6,16]]}}}],&quot;schema&quot;:&quot;https://github.com/citation-style-language/schema/raw/master/csl-citation.json&quot;} RNDXy6PZxvOAF"/><text:span text:style-name="T5">[2]</text:span><text:reference-mark-end text:name="ZOTERO_ITEM CSL_CITATION {&quot;citationID&quot;:&quot;HAvyt9rs&quot;,&quot;properties&quot;:{&quot;unsorted&quot;:false,&quot;formattedCitation&quot;:&quot;[2]&quot;,&quot;plainCitation&quot;:&quot;[2]&quot;,&quot;noteIndex&quot;:0},&quot;citationItems&quot;:[{&quot;id&quot;:6,&quot;uris&quot;:[&quot;http://zotero.org/users/local/Joc9xhOC/items/CM7LSC5X&quot;],&quot;itemData&quot;:{&quot;id&quot;:6,&quot;type&quot;:&quot;article-journal&quot;,&quot;container-title&quot;:&quot;Frontiers in Psychology&quot;,&quot;DOI&quot;:&quot;10.3389/fpsyg.2015.00835&quot;,&quot;ISSN&quot;:&quot;1664-1078&quot;,&quot;journalAbbreviation&quot;:&quot;Front. Psychol.&quot;,&quot;source&quot;:&quot;DOI.org (Crossref)&quot;,&quot;title&quot;:&quot;Motivating the unmotivated: how can health behavior be changed in those unwilling to change?&quot;,&quot;title-short&quot;:&quot;Motivating the unmotivated&quot;,&quot;URL&quot;:&quot;http://journal.frontiersin.org/Article/10.3389/fpsyg.2015.00835/abstract&quot;,&quot;volume&quot;:&quot;6&quot;,&quot;author&quot;:[{&quot;family&quot;:&quot;Hardcastle&quot;,&quot;given&quot;:&quot;Sarah J.&quot;},{&quot;family&quot;:&quot;Hancox&quot;,&quot;given&quot;:&quot;Jennie&quot;},{&quot;family&quot;:&quot;Hattar&quot;,&quot;given&quot;:&quot;Anne&quot;},{&quot;family&quot;:&quot;Maxwell-Smith&quot;,&quot;given&quot;:&quot;Chloe&quot;},{&quot;family&quot;:&quot;Thøgersen-Ntoumani&quot;,&quot;given&quot;:&quot;Cecilie&quot;},{&quot;family&quot;:&quot;Hagger&quot;,&quot;given&quot;:&quot;Martin S.&quot;}],&quot;accessed&quot;:{&quot;date-parts&quot;:[[&quot;2026&quot;,3,18]]},&quot;issued&quot;:{&quot;date-parts&quot;:[[&quot;2015&quot;,6,16]]}}}],&quot;schema&quot;:&quot;https://github.com/citation-style-language/schema/raw/master/csl-citation.json&quot;} RNDXy6PZxvOAF"/>. A probléma megoldásához olyan módszerre van szükség, amely nemcsak támogatja a változás megkezdését, hanem annak hosszú távú fenntartásához is hozzájárul. </text:p>
      <text:p text:style-name="P7">A fenti problémák kezelésére egyre nagyobb figyelem irányul a gamifikáció alkalmazására, amely játékos elemek beépítését jelenti nem játékos környezetben <text:reference-mark-start text:name="ZOTERO_ITEM CSL_CITATION {&quot;citationID&quot;:&quot;lu0r5IJy&quot;,&quot;properties&quot;:{&quot;unsorted&quot;:false,&quot;formattedCitation&quot;:&quot;[3]&quot;,&quot;plainCitation&quot;:&quot;[3]&quot;,&quot;noteIndex&quot;:0},&quot;citationItems&quot;:[{&quot;id&quot;:380,&quot;uris&quot;:[&quot;http://zotero.org/users/local/Joc9xhOC/items/GQUL9HNQ&quot;],&quot;itemData&quot;:{&quot;id&quot;:380,&quot;type&quot;:&quot;paper-conference&quot;,&quot;container-title&quot;:&quot;Proceedings of the 15th International Academic MindTrek Conference: Envisioning Future Media Environments&quot;,&quot;DOI&quot;:&quot;10.1145/2181037.2181040&quot;,&quot;page&quot;:&quot;9–15&quot;,&quot;publisher&quot;:&quot;Proceedings of the 15th International Academic MindTrek Conference: Envisioning Future Media Environments&quot;,&quot;title&quot;:&quot;From Game Design Elements to Gamefulness: Defining \&quot;Gamification\&quot;&quot;,&quot;URL&quot;:&quot;http://doi.acm.org/10.1145/2181037.2181040&quot;,&quot;author&quot;:[{&quot;family&quot;:&quot;Deterding&quot;,&quot;given&quot;:&quot;Sebastian&quot;},{&quot;family&quot;:&quot;Dixon&quot;,&quot;given&quot;:&quot;Dan&quot;},{&quot;family&quot;:&quot;Khaled&quot;,&quot;given&quot;:&quot;Rilla&quot;},{&quot;family&quot;:&quot;Nacke&quot;,&quot;given&quot;:&quot;Lennart&quot;}],&quot;issued&quot;:{&quot;date-parts&quot;:[[&quot;2011&quot;]]}}}],&quot;schema&quot;:&quot;https://github.com/citation-style-language/schema/raw/master/csl-citation.json&quot;} RND6yKVClrffb"/>[3]<text:reference-mark-end text:name="ZOTERO_ITEM CSL_CITATION {&quot;citationID&quot;:&quot;lu0r5IJy&quot;,&quot;properties&quot;:{&quot;unsorted&quot;:false,&quot;formattedCitation&quot;:&quot;[3]&quot;,&quot;plainCitation&quot;:&quot;[3]&quot;,&quot;noteIndex&quot;:0},&quot;citationItems&quot;:[{&quot;id&quot;:380,&quot;uris&quot;:[&quot;http://zotero.org/users/local/Joc9xhOC/items/GQUL9HNQ&quot;],&quot;itemData&quot;:{&quot;id&quot;:380,&quot;type&quot;:&quot;paper-conference&quot;,&quot;container-title&quot;:&quot;Proceedings of the 15th International Academic MindTrek Conference: Envisioning Future Media Environments&quot;,&quot;DOI&quot;:&quot;10.1145/2181037.2181040&quot;,&quot;page&quot;:&quot;9–15&quot;,&quot;publisher&quot;:&quot;Proceedings of the 15th International Academic MindTrek Conference: Envisioning Future Media Environments&quot;,&quot;title&quot;:&quot;From Game Design Elements to Gamefulness: Defining \&quot;Gamification\&quot;&quot;,&quot;URL&quot;:&quot;http://doi.acm.org/10.1145/2181037.2181040&quot;,&quot;author&quot;:[{&quot;family&quot;:&quot;Deterding&quot;,&quot;given&quot;:&quot;Sebastian&quot;},{&quot;family&quot;:&quot;Dixon&quot;,&quot;given&quot;:&quot;Dan&quot;},{&quot;family&quot;:&quot;Khaled&quot;,&quot;given&quot;:&quot;Rilla&quot;},{&quot;family&quot;:&quot;Nacke&quot;,&quot;given&quot;:&quot;Lennart&quot;}],&quot;issued&quot;:{&quot;date-parts&quot;:[[&quot;2011&quot;]]}}}],&quot;schema&quot;:&quot;https://github.com/citation-style-language/schema/raw/master/csl-citation.json&quot;} RND6yKVClrffb"/>. A gamifikáció célja a felhasználók motivációjának növelése, valamint a kívánt viselkedések kialakításának és fenntartásának támogatása. Az egészségfejlesztés területén ez kifejezetten fontos, mivel a felhasználói elköteleződés kulcsfontosságú a hosszú távú célok elérésében. Egy átfogó <text:soft-page-break/>elemzés rámutat arra, hogy az egészségügyi alkalmazásokban leggyakrabban alkalmazott technikák közé tartozik a visszajelzés és önmonitorozás, a célkitűzés, valamint a jutalmazás <text:reference-mark-start text:name="ZOTERO_ITEM CSL_CITATION {&quot;citationID&quot;:&quot;VsaMsliy&quot;,&quot;properties&quot;:{&quot;unsorted&quot;:false,&quot;formattedCitation&quot;:&quot;[4]&quot;,&quot;plainCitation&quot;:&quot;[4]&quot;,&quot;noteIndex&quot;:0},&quot;citationItems&quot;:[{&quot;id&quot;:8,&quot;uris&quot;:[&quot;http://zotero.org/users/local/Joc9xhOC/items/G38I95JL&quot;],&quot;itemData&quot;:{&quot;id&quot;:8,&quot;type&quot;:&quot;article-journal&quot;,&quot;abstract&quot;:&quot;Objective\n              Smartphone games that aim to alter health behaviours are common, but there is uncertainty about how to achieve this. We systematically reviewed health apps containing gaming elements analysing their embedded behaviour change techniques.\n            \n            \n              Methods\n              Two trained researchers independently coded apps for behaviour change techniques using a standard taxonomy. We explored associations with user ratings and price.\n            \n            \n              Data sources\n              We screened the National Health Service (NHS) Health Apps Library and all top-rated medical, health and wellness and health and fitness apps (defined by Apple and Google Play stores based on revenue and downloads). We included free and paid English language apps using ‘gamification’ (rewards, prizes, avatars, badges, leaderboards, competitions, levelling-up or health-related challenges). We excluded apps targeting health professionals.\n            \n            \n              Results\n              \n                64 of 1680 (4%) health apps included gamification and met inclusion criteria; only 3 of these were in the NHS Library. Behaviour change categories used were: feedback and monitoring (n=60, 94% of apps), reward and threat (n=52, 81%), and goals and planning (n=52, 81%). Individual techniques were: self-monitoring of behaviour (n=55, 86%), non-specific reward (n=49, 82%), social support unspecified (n=48, 75%), non-specific incentive (n=49, 82%) and focus on past success (n=47, 73%). Median number of techniques per app was 14 (range: 5–22). Common combinations were: goal setting, self-monitoring, non-specific reward and non-specific incentive (n=35, 55%); goal setting, self-monitoring and focus on past success (n=33, 52%). There was no correlation between number of techniques and user ratings (p=0.07; r\n                s\n                =0.23) or price (p=0.45; r\n                s\n                =0.10).\n              \n            \n            \n              Conclusions\n              Few health apps currently employ gamification and there is a wide variation in the use of behaviour change techniques, which may limit potential to improve health outcomes. We found no correlation between user rating (a possible proxy for health benefits) and game content or price. Further research is required to evaluate effective behaviour change techniques and to assess clinical outcomes.\n            \n            \n              Trial registration number\n              CRD42015029841.&quot;,&quot;container-title&quot;:&quot;BMJ Open&quot;,&quot;DOI&quot;:&quot;10.1136/bmjopen-2016-012447&quot;,&quot;ISSN&quot;:&quot;2044-6055, 2044-6055&quot;,&quot;issue&quot;:&quot;10&quot;,&quot;journalAbbreviation&quot;:&quot;BMJ Open&quot;,&quot;language&quot;:&quot;en&quot;,&quot;page&quot;:&quot;e012447&quot;,&quot;source&quot;:&quot;DOI.org (Crossref)&quot;,&quot;title&quot;:&quot;Gamification for health promotion: systematic review of behaviour change techniques in smartphone apps&quot;,&quot;title-short&quot;:&quot;Gamification for health promotion&quot;,&quot;volume&quot;:&quot;6&quot;,&quot;author&quot;:[{&quot;family&quot;:&quot;Edwards&quot;,&quot;given&quot;:&quot;E A&quot;},{&quot;family&quot;:&quot;Lumsden&quot;,&quot;given&quot;:&quot;J&quot;},{&quot;family&quot;:&quot;Rivas&quot;,&quot;given&quot;:&quot;C&quot;},{&quot;family&quot;:&quot;Steed&quot;,&quot;given&quot;:&quot;L&quot;},{&quot;family&quot;:&quot;Edwards&quot;,&quot;given&quot;:&quot;L A&quot;},{&quot;family&quot;:&quot;Thiyagarajan&quot;,&quot;given&quot;:&quot;A&quot;},{&quot;family&quot;:&quot;Sohanpal&quot;,&quot;given&quot;:&quot;R&quot;},{&quot;family&quot;:&quot;Caton&quot;,&quot;given&quot;:&quot;H&quot;},{&quot;family&quot;:&quot;Griffiths&quot;,&quot;given&quot;:&quot;C J&quot;},{&quot;family&quot;:&quot;Munafò&quot;,&quot;given&quot;:&quot;M R&quot;},{&quot;family&quot;:&quot;Taylor&quot;,&quot;given&quot;:&quot;S&quot;},{&quot;family&quot;:&quot;Walton&quot;,&quot;given&quot;:&quot;R T&quot;}],&quot;issued&quot;:{&quot;date-parts&quot;:[[&quot;2016&quot;,10]]}}}],&quot;schema&quot;:&quot;https://github.com/citation-style-language/schema/raw/master/csl-citation.json&quot;} RNDD78KWGLB1v"/>[4]<text:reference-mark-end text:name="ZOTERO_ITEM CSL_CITATION {&quot;citationID&quot;:&quot;VsaMsliy&quot;,&quot;properties&quot;:{&quot;unsorted&quot;:false,&quot;formattedCitation&quot;:&quot;[4]&quot;,&quot;plainCitation&quot;:&quot;[4]&quot;,&quot;noteIndex&quot;:0},&quot;citationItems&quot;:[{&quot;id&quot;:8,&quot;uris&quot;:[&quot;http://zotero.org/users/local/Joc9xhOC/items/G38I95JL&quot;],&quot;itemData&quot;:{&quot;id&quot;:8,&quot;type&quot;:&quot;article-journal&quot;,&quot;abstract&quot;:&quot;Objective\n              Smartphone games that aim to alter health behaviours are common, but there is uncertainty about how to achieve this. We systematically reviewed health apps containing gaming elements analysing their embedded behaviour change techniques.\n            \n            \n              Methods\n              Two trained researchers independently coded apps for behaviour change techniques using a standard taxonomy. We explored associations with user ratings and price.\n            \n            \n              Data sources\n              We screened the National Health Service (NHS) Health Apps Library and all top-rated medical, health and wellness and health and fitness apps (defined by Apple and Google Play stores based on revenue and downloads). We included free and paid English language apps using ‘gamification’ (rewards, prizes, avatars, badges, leaderboards, competitions, levelling-up or health-related challenges). We excluded apps targeting health professionals.\n            \n            \n              Results\n              \n                64 of 1680 (4%) health apps included gamification and met inclusion criteria; only 3 of these were in the NHS Library. Behaviour change categories used were: feedback and monitoring (n=60, 94% of apps), reward and threat (n=52, 81%), and goals and planning (n=52, 81%). Individual techniques were: self-monitoring of behaviour (n=55, 86%), non-specific reward (n=49, 82%), social support unspecified (n=48, 75%), non-specific incentive (n=49, 82%) and focus on past success (n=47, 73%). Median number of techniques per app was 14 (range: 5–22). Common combinations were: goal setting, self-monitoring, non-specific reward and non-specific incentive (n=35, 55%); goal setting, self-monitoring and focus on past success (n=33, 52%). There was no correlation between number of techniques and user ratings (p=0.07; r\n                s\n                =0.23) or price (p=0.45; r\n                s\n                =0.10).\n              \n            \n            \n              Conclusions\n              Few health apps currently employ gamification and there is a wide variation in the use of behaviour change techniques, which may limit potential to improve health outcomes. We found no correlation between user rating (a possible proxy for health benefits) and game content or price. Further research is required to evaluate effective behaviour change techniques and to assess clinical outcomes.\n            \n            \n              Trial registration number\n              CRD42015029841.&quot;,&quot;container-title&quot;:&quot;BMJ Open&quot;,&quot;DOI&quot;:&quot;10.1136/bmjopen-2016-012447&quot;,&quot;ISSN&quot;:&quot;2044-6055, 2044-6055&quot;,&quot;issue&quot;:&quot;10&quot;,&quot;journalAbbreviation&quot;:&quot;BMJ Open&quot;,&quot;language&quot;:&quot;en&quot;,&quot;page&quot;:&quot;e012447&quot;,&quot;source&quot;:&quot;DOI.org (Crossref)&quot;,&quot;title&quot;:&quot;Gamification for health promotion: systematic review of behaviour change techniques in smartphone apps&quot;,&quot;title-short&quot;:&quot;Gamification for health promotion&quot;,&quot;volume&quot;:&quot;6&quot;,&quot;author&quot;:[{&quot;family&quot;:&quot;Edwards&quot;,&quot;given&quot;:&quot;E A&quot;},{&quot;family&quot;:&quot;Lumsden&quot;,&quot;given&quot;:&quot;J&quot;},{&quot;family&quot;:&quot;Rivas&quot;,&quot;given&quot;:&quot;C&quot;},{&quot;family&quot;:&quot;Steed&quot;,&quot;given&quot;:&quot;L&quot;},{&quot;family&quot;:&quot;Edwards&quot;,&quot;given&quot;:&quot;L A&quot;},{&quot;family&quot;:&quot;Thiyagarajan&quot;,&quot;given&quot;:&quot;A&quot;},{&quot;family&quot;:&quot;Sohanpal&quot;,&quot;given&quot;:&quot;R&quot;},{&quot;family&quot;:&quot;Caton&quot;,&quot;given&quot;:&quot;H&quot;},{&quot;family&quot;:&quot;Griffiths&quot;,&quot;given&quot;:&quot;C J&quot;},{&quot;family&quot;:&quot;Munafò&quot;,&quot;given&quot;:&quot;M R&quot;},{&quot;family&quot;:&quot;Taylor&quot;,&quot;given&quot;:&quot;S&quot;},{&quot;family&quot;:&quot;Walton&quot;,&quot;given&quot;:&quot;R T&quot;}],&quot;issued&quot;:{&quot;date-parts&quot;:[[&quot;2016&quot;,10]]}}}],&quot;schema&quot;:&quot;https://github.com/citation-style-language/schema/raw/master/csl-citation.json&quot;} RNDD78KWGLB1v"/>. Ezek az elemek lehetővé teszik a felhasználók számára, hogy folyamatos visszacsatolást kapjanak saját teljesítményükről, nyomon kövessék fejlődésüket, valamint motivációt nyerjenek a kitűzött célok eléréséhez. A gamifikáció alkalmazása olyan eszközt kínál, amely képes összekapcsolni a viselkedésváltozás elméleti alapjait a gyakorlati megvalósítással, ezáltal hatékonyan támogatja az egészségtudatos életmód kialakítását. </text:p>
      <text:p text:style-name="P9">A szakdolgozat<text:span text:style-name="T6">om</text:span> keretében egy ilyen gamifikációs eszközökkel bővített, egészséges életmódra ösztönző mobilalkalmazás megtervezése és fejlesztése valósul meg. Az alkalmazás lehetőséget biztosít a napi aktivitás, a táplálkozás, valamint egyéb egészséggel kapcsolatos tényezők nyomon követésére. A rendszer központi eleme a felhasználók motiválása különböző játékos megoldások segítségével, mint például pontgyűjtés, kihívások teljesítése, szintlépések és statisztikai visszajelzések. A felhasználók ezáltal nemcsak rögzíthetik adataikat, hanem folyamatos visszajelzést is kapnak fejlődésükről, ami hozzájárulhat a hosszú távú elköteleződés fenntartásához. A cél egy olyan rendszer létrehozása, amely egyszerre informatív és motiváló, ezáltal hatékonyan támogatja az egészségtudatos viselkedés kialakulását. </text:p>
      <text:p text:style-name="P10">A dolgozat elkészítése során többféle módszer kerül alkalmazásra. Az első lépés a téma elméleti megalapozása, releváns szakirodalmak feldolgozásával. Ezt követően sor kerül a hasonló célú mobilalkalmazások elemzésére, különös tekintettel azok funkcionalitására és motivációs eszközeire. A tervezési szakaszban meghatározásra kerülnek az alkalmazás fő funkciói, valamint kialakításra kerül a rendszer felépítése és felhasználói felülete. A fejlesztési fázis során megvalósításra kerül az alkalmazás működése, majd ezt követően a rendszer tesztelése történik meg, amely elsősorban a működés ellenőrzésére és a stabilitás vizsgálatára irányul </text:p>
      <text:h text:style-name="Heading_20_1" text:outline-level="1"><text:bookmark-start text:name="__RefHeading___Toc15523_918428579"/>2. A gamifikáció szerepe mobilalkalmazásokban<text:bookmark-end text:name="__RefHeading___Toc15523_918428579"/></text:h>
      <text:h text:style-name="Heading_20_2" text:outline-level="2"><text:bookmark-start text:name="__RefHeading___Toc15525_918428579"/>2.1. <text:span text:style-name="T7">A g</text:span><text:span text:style-name="T8">a</text:span><text:span text:style-name="T7">mifikáció fogalma és alapjai</text:span><text:bookmark-end text:name="__RefHeading___Toc15525_918428579"/></text:h>
      <text:p text:style-name="P11"><text:span text:style-name="T9"><text:tab/></text:span>A digitális technológiák fejlődésével párhuzamosan egyre nagyobb hangsúlyt kapnak azok a megoldások, amelyek a felhasználói élmény növelésé<text:span text:style-name="T8">vel próbálják</text:span> elősegíteni a motivációt és a tartós elköteleződést. Különösen a mobilalkalmazások területén figyelhető meg az a tendencia, hogy a pusztán funkcionális rendszerek helyett olyan interaktív megoldások kerülnek előtérbe, amelyek <text:span text:style-name="T8">hosszabb távon </text:span>képesek fenntartani <text:span text:style-name="T8">a felhasználó érdeklődését</text:span>. Ebben a kontextusban vált kiemelt jelentőségűvé a gamifikáció, amely a játékokból ismert elemek és mechanizmusok alkalmazásán keresztül próbálja támogatni a felhasználói aktivitást. </text:p>
      <text:p text:style-name="Bekezdes">A gamifikáció fogalmának meghatározására a szakirodalomban több megközelítés is <text:span text:style-name="T8">létezik</text:span>, azonban az egyik legszélesebb körben elfogadott definíció Deterding és munkatársai nevéhez köthető. Meghatározásuk szerint a gamifikáció „a játéktervezési elemek alkalmazása nem játékos környezetben” <text:reference-mark-start text:name="ZOTERO_ITEM CSL_CITATION {&quot;citationID&quot;:&quot;fk7HquHV&quot;,&quot;properties&quot;:{&quot;unsorted&quot;:false,&quot;formattedCitation&quot;:&quot;[5]&quot;,&quot;plainCitation&quot;:&quot;[5]&quot;,&quot;noteIndex&quot;:0},&quot;citationItems&quot;:[{&quot;id&quot;:1505,&quot;uris&quot;:[&quot;http://zotero.org/users/local/Joc9xhOC/items/KDNXEU3C&quot;],&quot;itemData&quot;:{&quot;id&quot;:1505,&quot;type&quot;:&quot;paper-conference&quot;,&quot;container-title&quot;:&quot;Proceedings of the 15th International Academic MindTrek Conference: Envisioning Future Media Environments&quot;,&quot;DOI&quot;:&quot;10.1145/2181037.2181040&quot;,&quot;event-title&quot;:&quot;MindTrek '11: Academic MindTrek 2011&quot;,&quot;ISBN&quot;:&quot;978-1-4503-0816-8&quot;,&quot;language&quot;:&quot;en&quot;,&quot;page&quot;:&quot;9-15&quot;,&quot;publisher&quot;:&quot;ACM&quot;,&quot;publisher-place&quot;:&quot;Tampere Finland&quot;,&quot;source&quot;:&quot;DOI.org (Crossref)&quot;,&quot;title&quot;:&quot;From game design elements to gamefulness: defining \&quot;gamification\&quot;&quot;,&quot;title-short&quot;:&quot;From game design elements to gamefulness&quot;,&quot;URL&quot;:&quot;https://dl.acm.org/doi/10.1145/2181037.2181040&quot;,&quot;author&quot;:[{&quot;family&quot;:&quot;Deterding&quot;,&quot;given&quot;:&quot;Sebastian&quot;},{&quot;family&quot;:&quot;Dixon&quot;,&quot;given&quot;:&quot;Dan&quot;},{&quot;family&quot;:&quot;Khaled&quot;,&quot;given&quot;:&quot;Rilla&quot;},{&quot;family&quot;:&quot;Nacke&quot;,&quot;given&quot;:&quot;Lennart&quot;}],&quot;accessed&quot;:{&quot;date-parts&quot;:[[&quot;2026&quot;,3,19]]},&quot;issued&quot;:{&quot;date-parts&quot;:[[&quot;2011&quot;,9,28]]}}}],&quot;schema&quot;:&quot;https://github.com/citation-style-language/schema/raw/master/csl-citation.json&quot;} RND7FW80Zks5a"/>[5]<text:reference-mark-end text:name="ZOTERO_ITEM CSL_CITATION {&quot;citationID&quot;:&quot;fk7HquHV&quot;,&quot;properties&quot;:{&quot;unsorted&quot;:false,&quot;formattedCitation&quot;:&quot;[5]&quot;,&quot;plainCitation&quot;:&quot;[5]&quot;,&quot;noteIndex&quot;:0},&quot;citationItems&quot;:[{&quot;id&quot;:1505,&quot;uris&quot;:[&quot;http://zotero.org/users/local/Joc9xhOC/items/KDNXEU3C&quot;],&quot;itemData&quot;:{&quot;id&quot;:1505,&quot;type&quot;:&quot;paper-conference&quot;,&quot;container-title&quot;:&quot;Proceedings of the 15th International Academic MindTrek Conference: Envisioning Future Media Environments&quot;,&quot;DOI&quot;:&quot;10.1145/2181037.2181040&quot;,&quot;event-title&quot;:&quot;MindTrek '11: Academic MindTrek 2011&quot;,&quot;ISBN&quot;:&quot;978-1-4503-0816-8&quot;,&quot;language&quot;:&quot;en&quot;,&quot;page&quot;:&quot;9-15&quot;,&quot;publisher&quot;:&quot;ACM&quot;,&quot;publisher-place&quot;:&quot;Tampere Finland&quot;,&quot;source&quot;:&quot;DOI.org (Crossref)&quot;,&quot;title&quot;:&quot;From game design elements to gamefulness: defining \&quot;gamification\&quot;&quot;,&quot;title-short&quot;:&quot;From game design elements to gamefulness&quot;,&quot;URL&quot;:&quot;https://dl.acm.org/doi/10.1145/2181037.2181040&quot;,&quot;author&quot;:[{&quot;family&quot;:&quot;Deterding&quot;,&quot;given&quot;:&quot;Sebastian&quot;},{&quot;family&quot;:&quot;Dixon&quot;,&quot;given&quot;:&quot;Dan&quot;},{&quot;family&quot;:&quot;Khaled&quot;,&quot;given&quot;:&quot;Rilla&quot;},{&quot;family&quot;:&quot;Nacke&quot;,&quot;given&quot;:&quot;Lennart&quot;}],&quot;accessed&quot;:{&quot;date-parts&quot;:[[&quot;2026&quot;,3,19]]},&quot;issued&quot;:{&quot;date-parts&quot;:[[&quot;2011&quot;,9,28]]}}}],&quot;schema&quot;:&quot;https://github.com/citation-style-language/schema/raw/master/csl-citation.json&quot;} RND7FW80Zks5a"/>. Ez az értelmezés <text:span text:style-name="T8">egyértelműen</text:span> elkülöníti a gamifikációt a teljes értékű játékoktól, hangsúlyozva, hogy itt nem önálló játékok létrehozásáról van szó, hanem a játékokból ismert struktúrák, például pontozási rendszerek, szintek, kihívások vagy visszacsatolási mechanizmusok <text:span text:style-name="T8">alkalmazásáról</text:span>. </text:p>
      <text:p text:style-name="P12">A definícióból következik, hogy a gamifikáció nem azonos a teljes értékű játékokkal, hanem azok elemeinek <text:span text:style-name="T10">célszerű</text:span> alkalmazását jelenti. A hangsúly tehát nem a szórakoztatáson, hanem a felhasználói viselkedés és motiváció befolyásolásán van. A gamifikáció elsődleges célja jellemzően a felhasználói aktivitás növelése és az elköteleződés fenntartása, különösen olyan területeken, ahol a feladatok önmagukban kevésbé motiválóak.</text:p>
      <text:p text:style-name="P12">Fontos ugyanakkor, hogy a gamifikáció nem merül ki egyszerű játékelemek alkalmazásában, hanem tudatos tervezést igényel. Ennek megfelelően a következőkben érdemes részletesebben megvizsgálni a gamifikáció során alkalmazott játékelemeket és mechanizmusokat.</text:p>
      <text:h text:style-name="Heading_20_2" text:outline-level="2"><text:bookmark-start text:name="__RefHeading___Toc15527_918428579"/><text:soft-page-break/>2.2. A gamifikáció <text:span text:style-name="T11">játék</text:span>elemei és mechanizmusai<text:bookmark-end text:name="__RefHeading___Toc15527_918428579"/></text:h>
      <text:p text:style-name="Bekezdes"><text:tab/>A kutatások alapján számos különböző játékelem azonosítható, azonban ezek közül néhány kiemelkedően gyakran fordul elő. Ilyenek például a pontok, jelvények és ranglisták, amelyek a legtöbb gamifikált rendszer alapját képezik <text:reference-mark-start text:name="ZOTERO_ITEM CSL_CITATION {&quot;citationID&quot;:&quot;UEzgPy7E&quot;,&quot;properties&quot;:{&quot;unsorted&quot;:false,&quot;formattedCitation&quot;:&quot;[6]&quot;,&quot;plainCitation&quot;:&quot;[6]&quot;,&quot;noteIndex&quot;:0},&quot;citationItems&quot;:[{&quot;id&quot;:1506,&quot;uris&quot;:[&quot;http://zotero.org/users/local/Joc9xhOC/items/I9ZRSPJF&quot;],&quot;itemData&quot;:{&quot;id&quot;:1506,&quot;type&quot;:&quot;article-journal&quot;,&quot;abstract&quot;:&quot;We lack a shared and detailed understanding in gamification of what game elements are. To address this, we provide a scoping review of the last five years of gamification research, focusing primarily on how game elements have been applied and characterized. We retrieved the definitions of game elements from 280 research papers, conducted a content analysis, and identified their features. On the basis of this information, we provide responses regarding the frequently cited game elements, whether they are consistently characterized in the literature, and the frequently stated features of these elements. Our research has identified 15 game elements in the literature, with points, badges, and leaderboards being the most prevalent. As a first step toward clear definitions, we suggest a set of properties to characterize these game elements. The results of our review contribute to the formation of a consensus among gamification scholars about the application and definition of game elements.&quot;,&quot;container-title&quot;:&quot;Proceedings of the ACM on Human-Computer Interaction&quot;,&quot;DOI&quot;:&quot;10.1145/3611048&quot;,&quot;ISSN&quot;:&quot;2573-0142&quot;,&quot;issue&quot;:&quot;CHI PLAY&quot;,&quot;journalAbbreviation&quot;:&quot;Proc. ACM Hum.-Comput. Interact.&quot;,&quot;language&quot;:&quot;en&quot;,&quot;page&quot;:&quot;748-768&quot;,&quot;source&quot;:&quot;DOI.org (Crossref)&quot;,&quot;title&quot;:&quot;From Points to Progression: A Scoping Review of Game Elements in Gamification Research with a Content Analysis of 280 Research Papers&quot;,&quot;title-short&quot;:&quot;From Points to Progression&quot;,&quot;volume&quot;:&quot;7&quot;,&quot;author&quot;:[{&quot;family&quot;:&quot;Hallifax&quot;,&quot;given&quot;:&quot;Stuart&quot;},{&quot;family&quot;:&quot;Altmeyer&quot;,&quot;given&quot;:&quot;Maximilian&quot;},{&quot;family&quot;:&quot;Kölln&quot;,&quot;given&quot;:&quot;Kristina&quot;},{&quot;family&quot;:&quot;Rauschenberger&quot;,&quot;given&quot;:&quot;Maria&quot;},{&quot;family&quot;:&quot;Nacke&quot;,&quot;given&quot;:&quot;Lennart E.&quot;}],&quot;issued&quot;:{&quot;date-parts&quot;:[[&quot;2023&quot;,9,29]]}}}],&quot;schema&quot;:&quot;https://github.com/citation-style-language/schema/raw/master/csl-citation.json&quot;} RNDwz5TzJ7Po5"/>[6]<text:reference-mark-end text:name="ZOTERO_ITEM CSL_CITATION {&quot;citationID&quot;:&quot;UEzgPy7E&quot;,&quot;properties&quot;:{&quot;unsorted&quot;:false,&quot;formattedCitation&quot;:&quot;[6]&quot;,&quot;plainCitation&quot;:&quot;[6]&quot;,&quot;noteIndex&quot;:0},&quot;citationItems&quot;:[{&quot;id&quot;:1506,&quot;uris&quot;:[&quot;http://zotero.org/users/local/Joc9xhOC/items/I9ZRSPJF&quot;],&quot;itemData&quot;:{&quot;id&quot;:1506,&quot;type&quot;:&quot;article-journal&quot;,&quot;abstract&quot;:&quot;We lack a shared and detailed understanding in gamification of what game elements are. To address this, we provide a scoping review of the last five years of gamification research, focusing primarily on how game elements have been applied and characterized. We retrieved the definitions of game elements from 280 research papers, conducted a content analysis, and identified their features. On the basis of this information, we provide responses regarding the frequently cited game elements, whether they are consistently characterized in the literature, and the frequently stated features of these elements. Our research has identified 15 game elements in the literature, with points, badges, and leaderboards being the most prevalent. As a first step toward clear definitions, we suggest a set of properties to characterize these game elements. The results of our review contribute to the formation of a consensus among gamification scholars about the application and definition of game elements.&quot;,&quot;container-title&quot;:&quot;Proceedings of the ACM on Human-Computer Interaction&quot;,&quot;DOI&quot;:&quot;10.1145/3611048&quot;,&quot;ISSN&quot;:&quot;2573-0142&quot;,&quot;issue&quot;:&quot;CHI PLAY&quot;,&quot;journalAbbreviation&quot;:&quot;Proc. ACM Hum.-Comput. Interact.&quot;,&quot;language&quot;:&quot;en&quot;,&quot;page&quot;:&quot;748-768&quot;,&quot;source&quot;:&quot;DOI.org (Crossref)&quot;,&quot;title&quot;:&quot;From Points to Progression: A Scoping Review of Game Elements in Gamification Research with a Content Analysis of 280 Research Papers&quot;,&quot;title-short&quot;:&quot;From Points to Progression&quot;,&quot;volume&quot;:&quot;7&quot;,&quot;author&quot;:[{&quot;family&quot;:&quot;Hallifax&quot;,&quot;given&quot;:&quot;Stuart&quot;},{&quot;family&quot;:&quot;Altmeyer&quot;,&quot;given&quot;:&quot;Maximilian&quot;},{&quot;family&quot;:&quot;Kölln&quot;,&quot;given&quot;:&quot;Kristina&quot;},{&quot;family&quot;:&quot;Rauschenberger&quot;,&quot;given&quot;:&quot;Maria&quot;},{&quot;family&quot;:&quot;Nacke&quot;,&quot;given&quot;:&quot;Lennart E.&quot;}],&quot;issued&quot;:{&quot;date-parts&quot;:[[&quot;2023&quot;,9,29]]}}}],&quot;schema&quot;:&quot;https://github.com/citation-style-language/schema/raw/master/csl-citation.json&quot;} RNDwz5TzJ7Po5"/>. Ezek az elemek elsősorban jutalmazási és visszacsatolási funkciót töltenek be, lehetővé téve a felhasználó számára az előrehaladás nyomon követését és teljesítmény<text:span text:style-name="T11">e</text:span> értékelését.</text:p>
      <text:p text:style-name="Bekezdes">A játékelemek ugyanakkor nem csupán önálló <text:span text:style-name="T12">elemekként</text:span> értelmezhetők, hanem olyan strukturális <text:span text:style-name="T12">építőkockákként</text:span> is, amelyek hozzájárulnak a rendszer működésének átláthatóságához és a felhasználói élmény kialakításához. Segítségükkel meghatározhatók a célok, a szabályok, valamint az előrehaladás módjai, ezáltal támogatva a felhasználói bevonódást és a motiváció fenntartását <text:reference-mark-start text:name="ZOTERO_ITEM CSL_CITATION {&quot;citationID&quot;:&quot;Y5AX9EJY&quot;,&quot;properties&quot;:{&quot;unsorted&quot;:false,&quot;formattedCitation&quot;:&quot;[6]&quot;,&quot;plainCitation&quot;:&quot;[6]&quot;,&quot;noteIndex&quot;:0},&quot;citationItems&quot;:[{&quot;id&quot;:1506,&quot;uris&quot;:[&quot;http://zotero.org/users/local/Joc9xhOC/items/I9ZRSPJF&quot;],&quot;itemData&quot;:{&quot;id&quot;:1506,&quot;type&quot;:&quot;article-journal&quot;,&quot;abstract&quot;:&quot;We lack a shared and detailed understanding in gamification of what game elements are. To address this, we provide a scoping review of the last five years of gamification research, focusing primarily on how game elements have been applied and characterized. We retrieved the definitions of game elements from 280 research papers, conducted a content analysis, and identified their features. On the basis of this information, we provide responses regarding the frequently cited game elements, whether they are consistently characterized in the literature, and the frequently stated features of these elements. Our research has identified 15 game elements in the literature, with points, badges, and leaderboards being the most prevalent. As a first step toward clear definitions, we suggest a set of properties to characterize these game elements. The results of our review contribute to the formation of a consensus among gamification scholars about the application and definition of game elements.&quot;,&quot;container-title&quot;:&quot;Proceedings of the ACM on Human-Computer Interaction&quot;,&quot;DOI&quot;:&quot;10.1145/3611048&quot;,&quot;ISSN&quot;:&quot;2573-0142&quot;,&quot;issue&quot;:&quot;CHI PLAY&quot;,&quot;journalAbbreviation&quot;:&quot;Proc. ACM Hum.-Comput. Interact.&quot;,&quot;language&quot;:&quot;en&quot;,&quot;page&quot;:&quot;748-768&quot;,&quot;source&quot;:&quot;DOI.org (Crossref)&quot;,&quot;title&quot;:&quot;From Points to Progression: A Scoping Review of Game Elements in Gamification Research with a Content Analysis of 280 Research Papers&quot;,&quot;title-short&quot;:&quot;From Points to Progression&quot;,&quot;volume&quot;:&quot;7&quot;,&quot;author&quot;:[{&quot;family&quot;:&quot;Hallifax&quot;,&quot;given&quot;:&quot;Stuart&quot;},{&quot;family&quot;:&quot;Altmeyer&quot;,&quot;given&quot;:&quot;Maximilian&quot;},{&quot;family&quot;:&quot;Kölln&quot;,&quot;given&quot;:&quot;Kristina&quot;},{&quot;family&quot;:&quot;Rauschenberger&quot;,&quot;given&quot;:&quot;Maria&quot;},{&quot;family&quot;:&quot;Nacke&quot;,&quot;given&quot;:&quot;Lennart E.&quot;}],&quot;issued&quot;:{&quot;date-parts&quot;:[[&quot;2023&quot;,9,29]]}}}],&quot;schema&quot;:&quot;https://github.com/citation-style-language/schema/raw/master/csl-citation.json&quot;} RNDBZCycG3LSl"/>[6]<text:reference-mark-end text:name="ZOTERO_ITEM CSL_CITATION {&quot;citationID&quot;:&quot;Y5AX9EJY&quot;,&quot;properties&quot;:{&quot;unsorted&quot;:false,&quot;formattedCitation&quot;:&quot;[6]&quot;,&quot;plainCitation&quot;:&quot;[6]&quot;,&quot;noteIndex&quot;:0},&quot;citationItems&quot;:[{&quot;id&quot;:1506,&quot;uris&quot;:[&quot;http://zotero.org/users/local/Joc9xhOC/items/I9ZRSPJF&quot;],&quot;itemData&quot;:{&quot;id&quot;:1506,&quot;type&quot;:&quot;article-journal&quot;,&quot;abstract&quot;:&quot;We lack a shared and detailed understanding in gamification of what game elements are. To address this, we provide a scoping review of the last five years of gamification research, focusing primarily on how game elements have been applied and characterized. We retrieved the definitions of game elements from 280 research papers, conducted a content analysis, and identified their features. On the basis of this information, we provide responses regarding the frequently cited game elements, whether they are consistently characterized in the literature, and the frequently stated features of these elements. Our research has identified 15 game elements in the literature, with points, badges, and leaderboards being the most prevalent. As a first step toward clear definitions, we suggest a set of properties to characterize these game elements. The results of our review contribute to the formation of a consensus among gamification scholars about the application and definition of game elements.&quot;,&quot;container-title&quot;:&quot;Proceedings of the ACM on Human-Computer Interaction&quot;,&quot;DOI&quot;:&quot;10.1145/3611048&quot;,&quot;ISSN&quot;:&quot;2573-0142&quot;,&quot;issue&quot;:&quot;CHI PLAY&quot;,&quot;journalAbbreviation&quot;:&quot;Proc. ACM Hum.-Comput. Interact.&quot;,&quot;language&quot;:&quot;en&quot;,&quot;page&quot;:&quot;748-768&quot;,&quot;source&quot;:&quot;DOI.org (Crossref)&quot;,&quot;title&quot;:&quot;From Points to Progression: A Scoping Review of Game Elements in Gamification Research with a Content Analysis of 280 Research Papers&quot;,&quot;title-short&quot;:&quot;From Points to Progression&quot;,&quot;volume&quot;:&quot;7&quot;,&quot;author&quot;:[{&quot;family&quot;:&quot;Hallifax&quot;,&quot;given&quot;:&quot;Stuart&quot;},{&quot;family&quot;:&quot;Altmeyer&quot;,&quot;given&quot;:&quot;Maximilian&quot;},{&quot;family&quot;:&quot;Kölln&quot;,&quot;given&quot;:&quot;Kristina&quot;},{&quot;family&quot;:&quot;Rauschenberger&quot;,&quot;given&quot;:&quot;Maria&quot;},{&quot;family&quot;:&quot;Nacke&quot;,&quot;given&quot;:&quot;Lennart E.&quot;}],&quot;issued&quot;:{&quot;date-parts&quot;:[[&quot;2023&quot;,9,29]]}}}],&quot;schema&quot;:&quot;https://github.com/citation-style-language/schema/raw/master/csl-citation.json&quot;} RNDBZCycG3LSl"/>.</text:p>
      <text:p text:style-name="Bekezdes">A gyakorlatban ezek az elemek különböző módon jelennek meg a mobilalkalmazásokban. Például egy fitneszalkalmazás pontokat adhat a napi lépésszám vagy edzések teljesítéséért, <text:span text:style-name="T12">vagy akár az étrend betartásáért,</text:span> míg jelvényekkel jutalmazhatja a felhasználót bizonyos mérföldkövek elérésekor, például egy heti cél teljesítése esetén. A ranglisták lehetőséget biztosítanak a felhasználók közötti összehasonlításra, ami versengést idézhet elő, és tovább növelheti az aktivitást. Emellett gyakran alkalmaznak szinteket és kihívásokat is, amelyek fejlődési utat kínálnak, valamint rövid távú célok kitűzésével segítik a felhasználók folyamatos bevonását. </text:p>
      <text:p text:style-name="Bekezdes">Összességében elmondható, hogy a játékelemek megfelelő kombinációja kulcsszerepet játszik a gamifikáció sikerességében. A jól megtervezett rendszerek nem csupán rövid távú aktivitást <text:span text:style-name="T12">eredményezhetnek</text:span>, hanem képesek hosszabb távon is fenntartani a felhasználók motivációját és elköteleződését. </text:p>
      <text:h text:style-name="Heading_20_2" text:outline-level="2"><text:bookmark-start text:name="__RefHeading___Toc15529_918428579"/>2.3. A gamifikáció hatás<text:span text:style-name="T13">ossága a különböző alkalmazási területeken</text:span><text:bookmark-end text:name="__RefHeading___Toc15529_918428579"/></text:h>
      <text:p text:style-name="Bekezdes"><text:span text:style-name="T14"><text:tab/></text:span>A gamifikáció hatásosságát az elmúlt években számos kutatás vizsgálta különböző alkalmazási területeken. Az eredmények összességében azt mutatják, hogy a gamifikáció képes növelni a felhasználói aktivitást, motivációt és elköteleződést, ugyanakkor a hatások nem minden esetben egyértelműek. Egy átfogó szakirodalmi áttekintés, amely több száz tanulmány eredményeit elemezte, arra a következtetésre jutott, hogy bár a gamifikáció hatásai <text:soft-page-break/>többnyire pozitív irányba mutatnak, jelentős arányban jelennek meg vegyes vagy korlátozott eredmények is <text:reference-mark-start text:name="ZOTERO_ITEM CSL_CITATION {&quot;citationID&quot;:&quot;F1x2EnZT&quot;,&quot;properties&quot;:{&quot;unsorted&quot;:false,&quot;formattedCitation&quot;:&quot;[7]&quot;,&quot;plainCitation&quot;:&quot;[7]&quot;,&quot;noteIndex&quot;:0},&quot;citationItems&quot;:[{&quot;id&quot;:721,&quot;uris&quot;:[&quot;http://zotero.org/users/local/Joc9xhOC/items/9GEBHCGK&quot;],&quot;itemData&quot;:{&quot;id&quot;:721,&quot;type&quot;:&quot;article-journal&quot;,&quot;abstract&quot;:&quot;Today, our reality and lives are increasingly game-like, not only because games have become a pervasive part of our lives, but also because activities, systems and services are increasingly gamified. Gamification refers to designing information systems to afford similar experiences and motivations as games do, and consequently, attempting to affect user behavior. In recent years, popularity of gamification has skyrocketed and manifested in growing numbers of gamified applications, as well as a rapidly increasing amount of research. However, this vein of research has mainly advanced without an agenda, theoretical guidance or a clear picture of the field. To make the picture more coherent, we provide a comprehensive review of the gamification research (N = 819 studies) and analyze the research models and results in empirical studies on gamification. While the results in general lean towards positive findings about the effectiveness of gamification, the amount of mixed results is remarkable. Furthermore, education, health and crowdsourcing as well as points, badges and leaderboards persist as the most common contexts and ways of implementing gamification. Concurrently, gamification research still lacks coherence in research models, and a consistency in the variables and theoretical foundations. As a final contribution of the review, we provide a comprehensive discussion, consisting of 15 future research trajectories, on future agenda for the growing vein of literature on gamification and gameful systems within the information system science field.&quot;,&quot;container-title&quot;:&quot;International Journal of Information Management&quot;,&quot;DOI&quot;:&quot;10.1016/j.ijinfomgt.2018.10.013&quot;,&quot;ISSN&quot;:&quot;02684012&quot;,&quot;issue&quot;:&quot;July 2018&quot;,&quot;page&quot;:&quot;191–210&quot;,&quot;publisher&quot;:&quot;Elsevier&quot;,&quot;title&quot;:&quot;The rise of motivational information systems: A review of gamification research&quot;,&quot;volume&quot;:&quot;45&quot;,&quot;author&quot;:[{&quot;family&quot;:&quot;Koivisto&quot;,&quot;given&quot;:&quot;Jonna&quot;},{&quot;family&quot;:&quot;Hamari&quot;,&quot;given&quot;:&quot;Juho&quot;}],&quot;issued&quot;:{&quot;date-parts&quot;:[[&quot;2019&quot;]]}}}],&quot;schema&quot;:&quot;https://github.com/citation-style-language/schema/raw/master/csl-citation.json&quot;} RNDQq3ASaqNPN"/>[7]<text:reference-mark-end text:name="ZOTERO_ITEM CSL_CITATION {&quot;citationID&quot;:&quot;F1x2EnZT&quot;,&quot;properties&quot;:{&quot;unsorted&quot;:false,&quot;formattedCitation&quot;:&quot;[7]&quot;,&quot;plainCitation&quot;:&quot;[7]&quot;,&quot;noteIndex&quot;:0},&quot;citationItems&quot;:[{&quot;id&quot;:721,&quot;uris&quot;:[&quot;http://zotero.org/users/local/Joc9xhOC/items/9GEBHCGK&quot;],&quot;itemData&quot;:{&quot;id&quot;:721,&quot;type&quot;:&quot;article-journal&quot;,&quot;abstract&quot;:&quot;Today, our reality and lives are increasingly game-like, not only because games have become a pervasive part of our lives, but also because activities, systems and services are increasingly gamified. Gamification refers to designing information systems to afford similar experiences and motivations as games do, and consequently, attempting to affect user behavior. In recent years, popularity of gamification has skyrocketed and manifested in growing numbers of gamified applications, as well as a rapidly increasing amount of research. However, this vein of research has mainly advanced without an agenda, theoretical guidance or a clear picture of the field. To make the picture more coherent, we provide a comprehensive review of the gamification research (N = 819 studies) and analyze the research models and results in empirical studies on gamification. While the results in general lean towards positive findings about the effectiveness of gamification, the amount of mixed results is remarkable. Furthermore, education, health and crowdsourcing as well as points, badges and leaderboards persist as the most common contexts and ways of implementing gamification. Concurrently, gamification research still lacks coherence in research models, and a consistency in the variables and theoretical foundations. As a final contribution of the review, we provide a comprehensive discussion, consisting of 15 future research trajectories, on future agenda for the growing vein of literature on gamification and gameful systems within the information system science field.&quot;,&quot;container-title&quot;:&quot;International Journal of Information Management&quot;,&quot;DOI&quot;:&quot;10.1016/j.ijinfomgt.2018.10.013&quot;,&quot;ISSN&quot;:&quot;02684012&quot;,&quot;issue&quot;:&quot;July 2018&quot;,&quot;page&quot;:&quot;191–210&quot;,&quot;publisher&quot;:&quot;Elsevier&quot;,&quot;title&quot;:&quot;The rise of motivational information systems: A review of gamification research&quot;,&quot;volume&quot;:&quot;45&quot;,&quot;author&quot;:[{&quot;family&quot;:&quot;Koivisto&quot;,&quot;given&quot;:&quot;Jonna&quot;},{&quot;family&quot;:&quot;Hamari&quot;,&quot;given&quot;:&quot;Juho&quot;}],&quot;issued&quot;:{&quot;date-parts&quot;:[[&quot;2019&quot;]]}}}],&quot;schema&quot;:&quot;https://github.com/citation-style-language/schema/raw/master/csl-citation.json&quot;} RNDQq3ASaqNPN"/>.</text:p>
      <text:p text:style-name="Bekezdes">A különböző alkalmazási területek közül kiemelhető az oktatás <text:span text:style-name="T15">és </text:span><text:span text:style-name="T16">az egészségügyi</text:span> <text:s/>szolgáltatások. Az oktatásban a gamifikáció alkalmazásának egyik fő célja a tanuló bevon<text:span text:style-name="T16">ásának</text:span> növelése és a tanulási folyamat élményszerűbbé tétele. A játékos elem<text:span text:style-name="T17">ek </text:span>hozzájárulhatnak ahhoz, hogy a tanulók aktívabban vegyenek részt a feladatokban, azonban a tanulmányi teljesítményre gyakorolt hatás sok esetben csak mérsékelt mértékű <text:reference-mark-start text:name="ZOTERO_ITEM CSL_CITATION {&quot;citationID&quot;:&quot;H3PXUNXZ&quot;,&quot;properties&quot;:{&quot;unsorted&quot;:false,&quot;formattedCitation&quot;:&quot;[8]&quot;,&quot;plainCitation&quot;:&quot;[8]&quot;,&quot;noteIndex&quot;:0},&quot;citationItems&quot;:[{&quot;id&quot;:1507,&quot;uris&quot;:[&quot;http://zotero.org/users/local/Joc9xhOC/items/ZU8ZIW2E&quot;],&quot;itemData&quot;:{&quot;id&quot;:1507,&quot;type&quot;:&quot;article-journal&quot;,&quot;container-title&quot;:&quot;Educational Psychology Review&quot;,&quot;DOI&quot;:&quot;10.1007/s10648-019-09498-w&quot;,&quot;ISSN&quot;:&quot;1040-726X, 1573-336X&quot;,&quot;issue&quot;:&quot;1&quot;,&quot;journalAbbreviation&quot;:&quot;Educ Psychol Rev&quot;,&quot;language&quot;:&quot;en&quot;,&quot;page&quot;:&quot;77-112&quot;,&quot;source&quot;:&quot;DOI.org (Crossref)&quot;,&quot;title&quot;:&quot;The Gamification of Learning: a Meta-analysis&quot;,&quot;title-short&quot;:&quot;The Gamification of Learning&quot;,&quot;volume&quot;:&quot;32&quot;,&quot;author&quot;:[{&quot;family&quot;:&quot;Sailer&quot;,&quot;given&quot;:&quot;Michael&quot;},{&quot;family&quot;:&quot;Homner&quot;,&quot;given&quot;:&quot;Lisa&quot;}],&quot;issued&quot;:{&quot;date-parts&quot;:[[&quot;2020&quot;,3]]}}}],&quot;schema&quot;:&quot;https://github.com/citation-style-language/schema/raw/master/csl-citation.json&quot;} RNDz4D2h4dpdh"/>[8]<text:reference-mark-end text:name="ZOTERO_ITEM CSL_CITATION {&quot;citationID&quot;:&quot;H3PXUNXZ&quot;,&quot;properties&quot;:{&quot;unsorted&quot;:false,&quot;formattedCitation&quot;:&quot;[8]&quot;,&quot;plainCitation&quot;:&quot;[8]&quot;,&quot;noteIndex&quot;:0},&quot;citationItems&quot;:[{&quot;id&quot;:1507,&quot;uris&quot;:[&quot;http://zotero.org/users/local/Joc9xhOC/items/ZU8ZIW2E&quot;],&quot;itemData&quot;:{&quot;id&quot;:1507,&quot;type&quot;:&quot;article-journal&quot;,&quot;container-title&quot;:&quot;Educational Psychology Review&quot;,&quot;DOI&quot;:&quot;10.1007/s10648-019-09498-w&quot;,&quot;ISSN&quot;:&quot;1040-726X, 1573-336X&quot;,&quot;issue&quot;:&quot;1&quot;,&quot;journalAbbreviation&quot;:&quot;Educ Psychol Rev&quot;,&quot;language&quot;:&quot;en&quot;,&quot;page&quot;:&quot;77-112&quot;,&quot;source&quot;:&quot;DOI.org (Crossref)&quot;,&quot;title&quot;:&quot;The Gamification of Learning: a Meta-analysis&quot;,&quot;title-short&quot;:&quot;The Gamification of Learning&quot;,&quot;volume&quot;:&quot;32&quot;,&quot;author&quot;:[{&quot;family&quot;:&quot;Sailer&quot;,&quot;given&quot;:&quot;Michael&quot;},{&quot;family&quot;:&quot;Homner&quot;,&quot;given&quot;:&quot;Lisa&quot;}],&quot;issued&quot;:{&quot;date-parts&quot;:[[&quot;2020&quot;,3]]}}}],&quot;schema&quot;:&quot;https://github.com/citation-style-language/schema/raw/master/csl-citation.json&quot;} RNDz4D2h4dpdh"/>. </text:p>
      <text:p text:style-name="Bekezdes">Az egészségügyi és életmód-támogató alkalmazások esetében a gamifikáció főként a viselkedésváltozás segítésében jelenik meg. A játékos elemek, mint a jutalmak, szintek vagy visszajelzések, támogathatják a felhasználókat abban, hogy <text:span text:style-name="T15">rendszeresen</text:span> végezzenek egészségmegőrző tevékenységeket, például növeljék fizikai aktivitásukat. A kutatások ezen a területen is többnyire pozitív hatásokat mutatnak, különösen a viselkedés szintjén, ugyanakkor gyakoriak a vegyes eredmények is. Ez arra utal, hogy a gamifikáció hatásossága nagyban függ az alkalmazás módjától és a célcsoporttól <text:reference-mark-start text:name="ZOTERO_ITEM CSL_CITATION {&quot;citationID&quot;:&quot;dgejGMW7&quot;,&quot;properties&quot;:{&quot;unsorted&quot;:false,&quot;formattedCitation&quot;:&quot;[9]&quot;,&quot;plainCitation&quot;:&quot;[9]&quot;,&quot;noteIndex&quot;:0},&quot;citationItems&quot;:[{&quot;id&quot;:1124,&quot;uris&quot;:[&quot;http://zotero.org/users/local/Joc9xhOC/items/EMNAF5RE&quot;],&quot;itemData&quot;:{&quot;id&quot;:1124,&quot;type&quot;:&quot;article-journal&quot;,&quot;abstract&quot;:&quot;Background Compared to traditional persuasive technology and health games, gamification is posited to offer several advantages for motivating behaviour change for health and well-being, and increasingly used. Yet little is known about its effectiveness. Aims We aimed to assess the amount and quality of empirical support for the advantages and effectiveness of gamification applied to health and well-being. Methods We identified seven potential advantages of gamification from existing research and conducted a systematic literature review of empirical studies on gamification for health and well-being, assessing quality of evidence, effect type, and application domain. Results We identified 19 papers that report empirical evidence on the effect of gamification on health and well-being. 59% reported positive, 41% mixed effects, with mostly moderate or lower quality of evidence provided. Results were clear for health-related behaviours, but mixed for cognitive outcomes. Conclusions The current state of evidence supports that gamification can have a positive impact in health and wellbeing, particularly for health behaviours. However several studies report mixed or neutral effect. Findings need to be interpreted with caution due to the relatively small number of studies and methodological limitations of many studies (e.g., a lack of comparison of gamified interventions to non-gamified versions of the intervention).&quot;,&quot;container-title&quot;:&quot;Internet Interventions&quot;,&quot;DOI&quot;:&quot;10.1016/j.invent.2016.10.002&quot;,&quot;ISSN&quot;:&quot;22147829&quot;,&quot;page&quot;:&quot;89–106&quot;,&quot;publisher&quot;:&quot;The Authors&quot;,&quot;title&quot;:&quot;Gamification for health and wellbeing: A systematic review of the literature&quot;,&quot;volume&quot;:&quot;6&quot;,&quot;author&quot;:[{&quot;family&quot;:&quot;Johnson&quot;,&quot;given&quot;:&quot;Daniel&quot;},{&quot;family&quot;:&quot;Deterding&quot;,&quot;given&quot;:&quot;Sebastian&quot;},{&quot;family&quot;:&quot;Kuhn&quot;,&quot;given&quot;:&quot;Kerri-Ann Ann&quot;},{&quot;family&quot;:&quot;Staneva&quot;,&quot;given&quot;:&quot;Aleksandra&quot;},{&quot;family&quot;:&quot;Stoyanov&quot;,&quot;given&quot;:&quot;Stoyan&quot;},{&quot;family&quot;:&quot;Hides&quot;,&quot;given&quot;:&quot;Leanne&quot;}],&quot;issued&quot;:{&quot;date-parts&quot;:[[&quot;2016&quot;]]}}}],&quot;schema&quot;:&quot;https://github.com/citation-style-language/schema/raw/master/csl-citation.json&quot;} RNDnrM6ws27L5"/>[9]<text:reference-mark-end text:name="ZOTERO_ITEM CSL_CITATION {&quot;citationID&quot;:&quot;dgejGMW7&quot;,&quot;properties&quot;:{&quot;unsorted&quot;:false,&quot;formattedCitation&quot;:&quot;[9]&quot;,&quot;plainCitation&quot;:&quot;[9]&quot;,&quot;noteIndex&quot;:0},&quot;citationItems&quot;:[{&quot;id&quot;:1124,&quot;uris&quot;:[&quot;http://zotero.org/users/local/Joc9xhOC/items/EMNAF5RE&quot;],&quot;itemData&quot;:{&quot;id&quot;:1124,&quot;type&quot;:&quot;article-journal&quot;,&quot;abstract&quot;:&quot;Background Compared to traditional persuasive technology and health games, gamification is posited to offer several advantages for motivating behaviour change for health and well-being, and increasingly used. Yet little is known about its effectiveness. Aims We aimed to assess the amount and quality of empirical support for the advantages and effectiveness of gamification applied to health and well-being. Methods We identified seven potential advantages of gamification from existing research and conducted a systematic literature review of empirical studies on gamification for health and well-being, assessing quality of evidence, effect type, and application domain. Results We identified 19 papers that report empirical evidence on the effect of gamification on health and well-being. 59% reported positive, 41% mixed effects, with mostly moderate or lower quality of evidence provided. Results were clear for health-related behaviours, but mixed for cognitive outcomes. Conclusions The current state of evidence supports that gamification can have a positive impact in health and wellbeing, particularly for health behaviours. However several studies report mixed or neutral effect. Findings need to be interpreted with caution due to the relatively small number of studies and methodological limitations of many studies (e.g., a lack of comparison of gamified interventions to non-gamified versions of the intervention).&quot;,&quot;container-title&quot;:&quot;Internet Interventions&quot;,&quot;DOI&quot;:&quot;10.1016/j.invent.2016.10.002&quot;,&quot;ISSN&quot;:&quot;22147829&quot;,&quot;page&quot;:&quot;89–106&quot;,&quot;publisher&quot;:&quot;The Authors&quot;,&quot;title&quot;:&quot;Gamification for health and wellbeing: A systematic review of the literature&quot;,&quot;volume&quot;:&quot;6&quot;,&quot;author&quot;:[{&quot;family&quot;:&quot;Johnson&quot;,&quot;given&quot;:&quot;Daniel&quot;},{&quot;family&quot;:&quot;Deterding&quot;,&quot;given&quot;:&quot;Sebastian&quot;},{&quot;family&quot;:&quot;Kuhn&quot;,&quot;given&quot;:&quot;Kerri-Ann Ann&quot;},{&quot;family&quot;:&quot;Staneva&quot;,&quot;given&quot;:&quot;Aleksandra&quot;},{&quot;family&quot;:&quot;Stoyanov&quot;,&quot;given&quot;:&quot;Stoyan&quot;},{&quot;family&quot;:&quot;Hides&quot;,&quot;given&quot;:&quot;Leanne&quot;}],&quot;issued&quot;:{&quot;date-parts&quot;:[[&quot;2016&quot;]]}}}],&quot;schema&quot;:&quot;https://github.com/citation-style-language/schema/raw/master/csl-citation.json&quot;} RNDnrM6ws27L5"/>.</text:p>
      <text:p text:style-name="Bekezdes">Összességében elmondható, hogy a gamifikáció hatásossága kontextusfüggő. Bár a kutatások többsége pozitív hatásokról számol be, különösen a felhasználói aktivitás és bevonódás terén, az eredmények nem minden esetben egyértelműek <text:reference-mark-start text:name="ZOTERO_ITEM CSL_CITATION {&quot;citationID&quot;:&quot;ugCjhwy2&quot;,&quot;properties&quot;:{&quot;unsorted&quot;:false,&quot;formattedCitation&quot;:&quot;[7]&quot;,&quot;plainCitation&quot;:&quot;[7]&quot;,&quot;noteIndex&quot;:0},&quot;citationItems&quot;:[{&quot;id&quot;:721,&quot;uris&quot;:[&quot;http://zotero.org/users/local/Joc9xhOC/items/9GEBHCGK&quot;],&quot;itemData&quot;:{&quot;id&quot;:721,&quot;type&quot;:&quot;article-journal&quot;,&quot;abstract&quot;:&quot;Today, our reality and lives are increasingly game-like, not only because games have become a pervasive part of our lives, but also because activities, systems and services are increasingly gamified. Gamification refers to designing information systems to afford similar experiences and motivations as games do, and consequently, attempting to affect user behavior. In recent years, popularity of gamification has skyrocketed and manifested in growing numbers of gamified applications, as well as a rapidly increasing amount of research. However, this vein of research has mainly advanced without an agenda, theoretical guidance or a clear picture of the field. To make the picture more coherent, we provide a comprehensive review of the gamification research (N = 819 studies) and analyze the research models and results in empirical studies on gamification. While the results in general lean towards positive findings about the effectiveness of gamification, the amount of mixed results is remarkable. Furthermore, education, health and crowdsourcing as well as points, badges and leaderboards persist as the most common contexts and ways of implementing gamification. Concurrently, gamification research still lacks coherence in research models, and a consistency in the variables and theoretical foundations. As a final contribution of the review, we provide a comprehensive discussion, consisting of 15 future research trajectories, on future agenda for the growing vein of literature on gamification and gameful systems within the information system science field.&quot;,&quot;container-title&quot;:&quot;International Journal of Information Management&quot;,&quot;DOI&quot;:&quot;10.1016/j.ijinfomgt.2018.10.013&quot;,&quot;ISSN&quot;:&quot;02684012&quot;,&quot;issue&quot;:&quot;July 2018&quot;,&quot;page&quot;:&quot;191–210&quot;,&quot;publisher&quot;:&quot;Elsevier&quot;,&quot;title&quot;:&quot;The rise of motivational information systems: A review of gamification research&quot;,&quot;volume&quot;:&quot;45&quot;,&quot;author&quot;:[{&quot;family&quot;:&quot;Koivisto&quot;,&quot;given&quot;:&quot;Jonna&quot;},{&quot;family&quot;:&quot;Hamari&quot;,&quot;given&quot;:&quot;Juho&quot;}],&quot;issued&quot;:{&quot;date-parts&quot;:[[&quot;2019&quot;]]}}}],&quot;schema&quot;:&quot;https://github.com/citation-style-language/schema/raw/master/csl-citation.json&quot;} RNDX3tY1FTYth"/>[7]<text:reference-mark-end text:name="ZOTERO_ITEM CSL_CITATION {&quot;citationID&quot;:&quot;ugCjhwy2&quot;,&quot;properties&quot;:{&quot;unsorted&quot;:false,&quot;formattedCitation&quot;:&quot;[7]&quot;,&quot;plainCitation&quot;:&quot;[7]&quot;,&quot;noteIndex&quot;:0},&quot;citationItems&quot;:[{&quot;id&quot;:721,&quot;uris&quot;:[&quot;http://zotero.org/users/local/Joc9xhOC/items/9GEBHCGK&quot;],&quot;itemData&quot;:{&quot;id&quot;:721,&quot;type&quot;:&quot;article-journal&quot;,&quot;abstract&quot;:&quot;Today, our reality and lives are increasingly game-like, not only because games have become a pervasive part of our lives, but also because activities, systems and services are increasingly gamified. Gamification refers to designing information systems to afford similar experiences and motivations as games do, and consequently, attempting to affect user behavior. In recent years, popularity of gamification has skyrocketed and manifested in growing numbers of gamified applications, as well as a rapidly increasing amount of research. However, this vein of research has mainly advanced without an agenda, theoretical guidance or a clear picture of the field. To make the picture more coherent, we provide a comprehensive review of the gamification research (N = 819 studies) and analyze the research models and results in empirical studies on gamification. While the results in general lean towards positive findings about the effectiveness of gamification, the amount of mixed results is remarkable. Furthermore, education, health and crowdsourcing as well as points, badges and leaderboards persist as the most common contexts and ways of implementing gamification. Concurrently, gamification research still lacks coherence in research models, and a consistency in the variables and theoretical foundations. As a final contribution of the review, we provide a comprehensive discussion, consisting of 15 future research trajectories, on future agenda for the growing vein of literature on gamification and gameful systems within the information system science field.&quot;,&quot;container-title&quot;:&quot;International Journal of Information Management&quot;,&quot;DOI&quot;:&quot;10.1016/j.ijinfomgt.2018.10.013&quot;,&quot;ISSN&quot;:&quot;02684012&quot;,&quot;issue&quot;:&quot;July 2018&quot;,&quot;page&quot;:&quot;191–210&quot;,&quot;publisher&quot;:&quot;Elsevier&quot;,&quot;title&quot;:&quot;The rise of motivational information systems: A review of gamification research&quot;,&quot;volume&quot;:&quot;45&quot;,&quot;author&quot;:[{&quot;family&quot;:&quot;Koivisto&quot;,&quot;given&quot;:&quot;Jonna&quot;},{&quot;family&quot;:&quot;Hamari&quot;,&quot;given&quot;:&quot;Juho&quot;}],&quot;issued&quot;:{&quot;date-parts&quot;:[[&quot;2019&quot;]]}}}],&quot;schema&quot;:&quot;https://github.com/citation-style-language/schema/raw/master/csl-citation.json&quot;} RNDX3tY1FTYth"/>. A hatás mértékét jelentősen befolyásolja az alkalmazott játékelemek típusa, azok megvalósítása, valamint a célcsoport jellemzői. Ennek alapján a gamifikáció nem tekinthető univerzálisan hatékony megoldásnak, hanem olyan eszköznek, amely megfelelő tervezés mellett képes támogatni a motivációt és a viselkedésváltozást. </text:p>
      <text:h text:style-name="Heading_20_2" text:outline-level="2"><text:bookmark-start text:name="__RefHeading___Toc15531_918428579"/>2.<text:span text:style-name="T18">4</text:span>. A gami<text:span text:style-name="T19">f</text:span>ikáció korlátai és kritikái<text:bookmark-end text:name="__RefHeading___Toc15531_918428579"/></text:h>
      <text:p text:style-name="Bekezdes"><text:span text:style-name="T20"><text:tab/></text:span>Az eddigiekben a gamifikáció pozitív oldalát vizsgáltuk, azonban mint minden megközelítésnek, ennek is vannak korlátai és kedvezőtlen hatásai. Bár a gamifikációt gyakran a felhasználói motiváció növelésének és az elköteleződés erősítésének hatékony eszközeként tartják számon, a kutatások rámutatnak arra, hogy alkalmazása nem minden esetben vezet a kívánt eredményekhez <text:reference-mark-start text:name="ZOTERO_ITEM CSL_CITATION {&quot;citationID&quot;:&quot;cUNlyNfA&quot;,&quot;properties&quot;:{&quot;unsorted&quot;:false,&quot;formattedCitation&quot;:&quot;[10]&quot;,&quot;plainCitation&quot;:&quot;[10]&quot;,&quot;noteIndex&quot;:0},&quot;citationItems&quot;:[{&quot;id&quot;:1283,&quot;uris&quot;:[&quot;http://zotero.org/users/local/Joc9xhOC/items/TKB93XA9&quot;],&quot;itemData&quot;:{&quot;id&quot;:1283,&quot;type&quot;:&quot;article-journal&quot;,&quot;container-title&quot;:&quot;Information and Software Technology&quot;,&quot;DOI&quot;:&quot;10.1016/j.infsof.2022.107142&quot;,&quot;ISSN&quot;:&quot;09505849&quot;,&quot;language&quot;:&quot;en&quot;,&quot;page&quot;:&quot;107142&quot;,&quot;title&quot;:&quot;Negative effects of gamification in education software: Systematic mapping and practitioner perceptions&quot;,&quot;title-short&quot;:&quot;Negative effects of gamification in education software&quot;,&quot;volume&quot;:&quot;156&quot;,&quot;author&quot;:[{&quot;family&quot;:&quot;Almeida&quot;,&quot;given&quot;:&quot;Cláuvin&quot;},{&quot;family&quot;:&quot;Kalinowski&quot;,&quot;given&quot;:&quot;Marcos&quot;},{&quot;family&quot;:&quot;Uchôa&quot;,&quot;given&quot;:&quot;Anderson&quot;},{&quot;family&quot;:&quot;Feijó&quot;,&quot;given&quot;:&quot;Bruno&quot;}],&quot;issued&quot;:{&quot;date-parts&quot;:[[&quot;2023&quot;]]}}}],&quot;schema&quot;:&quot;https://github.com/citation-style-language/schema/raw/master/csl-citation.json&quot;} RNDfTrcCwCRbf"/>[10]<text:reference-mark-end text:name="ZOTERO_ITEM CSL_CITATION {&quot;citationID&quot;:&quot;cUNlyNfA&quot;,&quot;properties&quot;:{&quot;unsorted&quot;:false,&quot;formattedCitation&quot;:&quot;[10]&quot;,&quot;plainCitation&quot;:&quot;[10]&quot;,&quot;noteIndex&quot;:0},&quot;citationItems&quot;:[{&quot;id&quot;:1283,&quot;uris&quot;:[&quot;http://zotero.org/users/local/Joc9xhOC/items/TKB93XA9&quot;],&quot;itemData&quot;:{&quot;id&quot;:1283,&quot;type&quot;:&quot;article-journal&quot;,&quot;container-title&quot;:&quot;Information and Software Technology&quot;,&quot;DOI&quot;:&quot;10.1016/j.infsof.2022.107142&quot;,&quot;ISSN&quot;:&quot;09505849&quot;,&quot;language&quot;:&quot;en&quot;,&quot;page&quot;:&quot;107142&quot;,&quot;title&quot;:&quot;Negative effects of gamification in education software: Systematic mapping and practitioner perceptions&quot;,&quot;title-short&quot;:&quot;Negative effects of gamification in education software&quot;,&quot;volume&quot;:&quot;156&quot;,&quot;author&quot;:[{&quot;family&quot;:&quot;Almeida&quot;,&quot;given&quot;:&quot;Cláuvin&quot;},{&quot;family&quot;:&quot;Kalinowski&quot;,&quot;given&quot;:&quot;Marcos&quot;},{&quot;family&quot;:&quot;Uchôa&quot;,&quot;given&quot;:&quot;Anderson&quot;},{&quot;family&quot;:&quot;Feijó&quot;,&quot;given&quot;:&quot;Bruno&quot;}],&quot;issued&quot;:{&quot;date-parts&quot;:[[&quot;2023&quot;]]}}}],&quot;schema&quot;:&quot;https://github.com/citation-style-language/schema/raw/master/csl-citation.json&quot;} RNDfTrcCwCRbf"/>. Bizonyos helyzetekben kifejezetten negatív következmények is megjelenhetnek, amelyek sokszor nem szándékoltak, és csak a rendszer használata során válnak láthatóvá. Ezért a gamifikáció értékelésekor nem elegendő kizárólag a pozitív <text:soft-page-break/>hatásokra koncentrálni, hanem szükséges figyelembe venni annak korlátait és lehetséges kockázatait is.</text:p>
      <text:p text:style-name="Bekezdes">A kutatások több konkrét negatív hatást is azonosítottak a gamifikáció alkalmazásával kapcsolatban. Gyakran jelentkeznek motivációs problémák, például a kezdeti érdeklődés csökkenése vagy a külső jutalmak túlhangsúlyozása. Emellett a játékos elemek elterelhetik a figyelmet a tanulási vagy feladatvégzési célról, ami a megértés romlásához vezethet. További gyakori probléma a rendszer kijátszása, amikor a felhasználók nem a kívánt viselkedést követik, hanem a jutalmazási mechanizmusok kihasználására törekednek <text:reference-mark-start text:name="ZOTERO_ITEM CSL_CITATION {&quot;citationID&quot;:&quot;qB1UNfko&quot;,&quot;properties&quot;:{&quot;unsorted&quot;:false,&quot;formattedCitation&quot;:&quot;[10]&quot;,&quot;plainCitation&quot;:&quot;[10]&quot;,&quot;noteIndex&quot;:0},&quot;citationItems&quot;:[{&quot;id&quot;:1283,&quot;uris&quot;:[&quot;http://zotero.org/users/local/Joc9xhOC/items/TKB93XA9&quot;],&quot;itemData&quot;:{&quot;id&quot;:1283,&quot;type&quot;:&quot;article-journal&quot;,&quot;container-title&quot;:&quot;Information and Software Technology&quot;,&quot;DOI&quot;:&quot;10.1016/j.infsof.2022.107142&quot;,&quot;ISSN&quot;:&quot;09505849&quot;,&quot;language&quot;:&quot;en&quot;,&quot;page&quot;:&quot;107142&quot;,&quot;title&quot;:&quot;Negative effects of gamification in education software: Systematic mapping and practitioner perceptions&quot;,&quot;title-short&quot;:&quot;Negative effects of gamification in education software&quot;,&quot;volume&quot;:&quot;156&quot;,&quot;author&quot;:[{&quot;family&quot;:&quot;Almeida&quot;,&quot;given&quot;:&quot;Cláuvin&quot;},{&quot;family&quot;:&quot;Kalinowski&quot;,&quot;given&quot;:&quot;Marcos&quot;},{&quot;family&quot;:&quot;Uchôa&quot;,&quot;given&quot;:&quot;Anderson&quot;},{&quot;family&quot;:&quot;Feijó&quot;,&quot;given&quot;:&quot;Bruno&quot;}],&quot;issued&quot;:{&quot;date-parts&quot;:[[&quot;2023&quot;]]}}}],&quot;schema&quot;:&quot;https://github.com/citation-style-language/schema/raw/master/csl-citation.json&quot;} RND3bYYgs6vn5"/>[10]<text:reference-mark-end text:name="ZOTERO_ITEM CSL_CITATION {&quot;citationID&quot;:&quot;qB1UNfko&quot;,&quot;properties&quot;:{&quot;unsorted&quot;:false,&quot;formattedCitation&quot;:&quot;[10]&quot;,&quot;plainCitation&quot;:&quot;[10]&quot;,&quot;noteIndex&quot;:0},&quot;citationItems&quot;:[{&quot;id&quot;:1283,&quot;uris&quot;:[&quot;http://zotero.org/users/local/Joc9xhOC/items/TKB93XA9&quot;],&quot;itemData&quot;:{&quot;id&quot;:1283,&quot;type&quot;:&quot;article-journal&quot;,&quot;container-title&quot;:&quot;Information and Software Technology&quot;,&quot;DOI&quot;:&quot;10.1016/j.infsof.2022.107142&quot;,&quot;ISSN&quot;:&quot;09505849&quot;,&quot;language&quot;:&quot;en&quot;,&quot;page&quot;:&quot;107142&quot;,&quot;title&quot;:&quot;Negative effects of gamification in education software: Systematic mapping and practitioner perceptions&quot;,&quot;title-short&quot;:&quot;Negative effects of gamification in education software&quot;,&quot;volume&quot;:&quot;156&quot;,&quot;author&quot;:[{&quot;family&quot;:&quot;Almeida&quot;,&quot;given&quot;:&quot;Cláuvin&quot;},{&quot;family&quot;:&quot;Kalinowski&quot;,&quot;given&quot;:&quot;Marcos&quot;},{&quot;family&quot;:&quot;Uchôa&quot;,&quot;given&quot;:&quot;Anderson&quot;},{&quot;family&quot;:&quot;Feijó&quot;,&quot;given&quot;:&quot;Bruno&quot;}],&quot;issued&quot;:{&quot;date-parts&quot;:[[&quot;2023&quot;]]}}}],&quot;schema&quot;:&quot;https://github.com/citation-style-language/schema/raw/master/csl-citation.json&quot;} RND3bYYgs6vn5"/>. </text:p>
      <text:p text:style-name="Bekezdes">A gamifikáció negatív hatásai között kiemelt szerepet kap a felhasználók közötti folyamatos összehasonlítás is. A különböző ranglisták, és megosztott teljesítményadatok ugyan ösztönözhetik az aktivitást, ugyanakkor <text:span text:style-name="T21">negatív</text:span> pszichológiai következményekkel is járhatnak. A kutatások szerint a másokhoz való viszonyítás negatív önértékelést, bizonytalanságot, frusztrációt és önbizalomcsökkenést <text:span text:style-name="T21">okozhat</text:span>, különösen akkor, ha a felhasználó nála jobban teljesítő személyekhez méri magát <text:reference-mark-start text:name="ZOTERO_ITEM CSL_CITATION {&quot;citationID&quot;:&quot;CrkLF1ko&quot;,&quot;properties&quot;:{&quot;unsorted&quot;:false,&quot;formattedCitation&quot;:&quot;[11]&quot;,&quot;plainCitation&quot;:&quot;[11]&quot;,&quot;noteIndex&quot;:0},&quot;citationItems&quot;:[{&quot;id&quot;:1509,&quot;uris&quot;:[&quot;http://zotero.org/users/local/Joc9xhOC/items/JSJ6ZA8K&quot;],&quot;itemData&quot;:{&quot;id&quot;:1509,&quot;type&quot;:&quot;paper-conference&quot;,&quot;container-title&quot;:&quot;Proceedings of the 2025 CHI Conference on Human Factors in Computing Systems&quot;,&quot;DOI&quot;:&quot;10.1145/3706598.3713737&quot;,&quot;event-title&quot;:&quot;CHI 2025: CHI Conference on Human Factors in Computing Systems&quot;,&quot;ISBN&quot;:&quot;979-8-4007-1394-1&quot;,&quot;language&quot;:&quot;en&quot;,&quot;page&quot;:&quot;1-21&quot;,&quot;publisher&quot;:&quot;ACM&quot;,&quot;publisher-place&quot;:&quot;Yokohama Japan&quot;,&quot;source&quot;:&quot;DOI.org (Crossref)&quot;,&quot;title&quot;:&quot;Unhealthy Comparisons to Promote Healthy Behavior? Exploring the Impact of Social Comparison Strategies in Personal Informatics.&quot;,&quot;title-short&quot;:&quot;Unhealthy Comparisons to Promote Healthy Behavior?&quot;,&quot;URL&quot;:&quot;https://dl.acm.org/doi/10.1145/3706598.3713737&quot;,&quot;author&quot;:[{&quot;family&quot;:&quot;Van Zandvoort&quot;,&quot;given&quot;:&quot;Daphne&quot;},{&quot;family&quot;:&quot;Vredenborg&quot;,&quot;given&quot;:&quot;Marloes&quot;},{&quot;family&quot;:&quot;Bentvelzen&quot;,&quot;given&quot;:&quot;Marit&quot;}],&quot;accessed&quot;:{&quot;date-parts&quot;:[[&quot;2026&quot;,3,19]]},&quot;issued&quot;:{&quot;date-parts&quot;:[[&quot;2025&quot;,4,26]]}}}],&quot;schema&quot;:&quot;https://github.com/citation-style-language/schema/raw/master/csl-citation.json&quot;} RNDiT9KAfajeO"/>[11]<text:reference-mark-end text:name="ZOTERO_ITEM CSL_CITATION {&quot;citationID&quot;:&quot;CrkLF1ko&quot;,&quot;properties&quot;:{&quot;unsorted&quot;:false,&quot;formattedCitation&quot;:&quot;[11]&quot;,&quot;plainCitation&quot;:&quot;[11]&quot;,&quot;noteIndex&quot;:0},&quot;citationItems&quot;:[{&quot;id&quot;:1509,&quot;uris&quot;:[&quot;http://zotero.org/users/local/Joc9xhOC/items/JSJ6ZA8K&quot;],&quot;itemData&quot;:{&quot;id&quot;:1509,&quot;type&quot;:&quot;paper-conference&quot;,&quot;container-title&quot;:&quot;Proceedings of the 2025 CHI Conference on Human Factors in Computing Systems&quot;,&quot;DOI&quot;:&quot;10.1145/3706598.3713737&quot;,&quot;event-title&quot;:&quot;CHI 2025: CHI Conference on Human Factors in Computing Systems&quot;,&quot;ISBN&quot;:&quot;979-8-4007-1394-1&quot;,&quot;language&quot;:&quot;en&quot;,&quot;page&quot;:&quot;1-21&quot;,&quot;publisher&quot;:&quot;ACM&quot;,&quot;publisher-place&quot;:&quot;Yokohama Japan&quot;,&quot;source&quot;:&quot;DOI.org (Crossref)&quot;,&quot;title&quot;:&quot;Unhealthy Comparisons to Promote Healthy Behavior? Exploring the Impact of Social Comparison Strategies in Personal Informatics.&quot;,&quot;title-short&quot;:&quot;Unhealthy Comparisons to Promote Healthy Behavior?&quot;,&quot;URL&quot;:&quot;https://dl.acm.org/doi/10.1145/3706598.3713737&quot;,&quot;author&quot;:[{&quot;family&quot;:&quot;Van Zandvoort&quot;,&quot;given&quot;:&quot;Daphne&quot;},{&quot;family&quot;:&quot;Vredenborg&quot;,&quot;given&quot;:&quot;Marloes&quot;},{&quot;family&quot;:&quot;Bentvelzen&quot;,&quot;given&quot;:&quot;Marit&quot;}],&quot;accessed&quot;:{&quot;date-parts&quot;:[[&quot;2026&quot;,3,19]]},&quot;issued&quot;:{&quot;date-parts&quot;:[[&quot;2025&quot;,4,26]]}}}],&quot;schema&quot;:&quot;https://github.com/citation-style-language/schema/raw/master/csl-citation.json&quot;} RNDiT9KAfajeO"/>. Ez a hatás még erősebben jelentkezhet érzékenyebb adatok esetén, például testzsírszázalékhoz vagy más testi jellemzőkhöz kapcsolódó összehasonlításoknál, amelyek szégyenérzetet vagy fokozott önkritikát is kiválthatnak <text:reference-mark-start text:name="ZOTERO_ITEM CSL_CITATION {&quot;citationID&quot;:&quot;bPBU5bJy&quot;,&quot;properties&quot;:{&quot;unsorted&quot;:false,&quot;formattedCitation&quot;:&quot;[11]&quot;,&quot;plainCitation&quot;:&quot;[11]&quot;,&quot;noteIndex&quot;:0},&quot;citationItems&quot;:[{&quot;id&quot;:1509,&quot;uris&quot;:[&quot;http://zotero.org/users/local/Joc9xhOC/items/JSJ6ZA8K&quot;],&quot;itemData&quot;:{&quot;id&quot;:1509,&quot;type&quot;:&quot;paper-conference&quot;,&quot;container-title&quot;:&quot;Proceedings of the 2025 CHI Conference on Human Factors in Computing Systems&quot;,&quot;DOI&quot;:&quot;10.1145/3706598.3713737&quot;,&quot;event-title&quot;:&quot;CHI 2025: CHI Conference on Human Factors in Computing Systems&quot;,&quot;ISBN&quot;:&quot;979-8-4007-1394-1&quot;,&quot;language&quot;:&quot;en&quot;,&quot;page&quot;:&quot;1-21&quot;,&quot;publisher&quot;:&quot;ACM&quot;,&quot;publisher-place&quot;:&quot;Yokohama Japan&quot;,&quot;source&quot;:&quot;DOI.org (Crossref)&quot;,&quot;title&quot;:&quot;Unhealthy Comparisons to Promote Healthy Behavior? Exploring the Impact of Social Comparison Strategies in Personal Informatics.&quot;,&quot;title-short&quot;:&quot;Unhealthy Comparisons to Promote Healthy Behavior?&quot;,&quot;URL&quot;:&quot;https://dl.acm.org/doi/10.1145/3706598.3713737&quot;,&quot;author&quot;:[{&quot;family&quot;:&quot;Van Zandvoort&quot;,&quot;given&quot;:&quot;Daphne&quot;},{&quot;family&quot;:&quot;Vredenborg&quot;,&quot;given&quot;:&quot;Marloes&quot;},{&quot;family&quot;:&quot;Bentvelzen&quot;,&quot;given&quot;:&quot;Marit&quot;}],&quot;accessed&quot;:{&quot;date-parts&quot;:[[&quot;2026&quot;,3,19]]},&quot;issued&quot;:{&quot;date-parts&quot;:[[&quot;2025&quot;,4,26]]}}}],&quot;schema&quot;:&quot;https://github.com/citation-style-language/schema/raw/master/csl-citation.json&quot;} RNDw59pFNV7X1"/>[11]<text:reference-mark-end text:name="ZOTERO_ITEM CSL_CITATION {&quot;citationID&quot;:&quot;bPBU5bJy&quot;,&quot;properties&quot;:{&quot;unsorted&quot;:false,&quot;formattedCitation&quot;:&quot;[11]&quot;,&quot;plainCitation&quot;:&quot;[11]&quot;,&quot;noteIndex&quot;:0},&quot;citationItems&quot;:[{&quot;id&quot;:1509,&quot;uris&quot;:[&quot;http://zotero.org/users/local/Joc9xhOC/items/JSJ6ZA8K&quot;],&quot;itemData&quot;:{&quot;id&quot;:1509,&quot;type&quot;:&quot;paper-conference&quot;,&quot;container-title&quot;:&quot;Proceedings of the 2025 CHI Conference on Human Factors in Computing Systems&quot;,&quot;DOI&quot;:&quot;10.1145/3706598.3713737&quot;,&quot;event-title&quot;:&quot;CHI 2025: CHI Conference on Human Factors in Computing Systems&quot;,&quot;ISBN&quot;:&quot;979-8-4007-1394-1&quot;,&quot;language&quot;:&quot;en&quot;,&quot;page&quot;:&quot;1-21&quot;,&quot;publisher&quot;:&quot;ACM&quot;,&quot;publisher-place&quot;:&quot;Yokohama Japan&quot;,&quot;source&quot;:&quot;DOI.org (Crossref)&quot;,&quot;title&quot;:&quot;Unhealthy Comparisons to Promote Healthy Behavior? Exploring the Impact of Social Comparison Strategies in Personal Informatics.&quot;,&quot;title-short&quot;:&quot;Unhealthy Comparisons to Promote Healthy Behavior?&quot;,&quot;URL&quot;:&quot;https://dl.acm.org/doi/10.1145/3706598.3713737&quot;,&quot;author&quot;:[{&quot;family&quot;:&quot;Van Zandvoort&quot;,&quot;given&quot;:&quot;Daphne&quot;},{&quot;family&quot;:&quot;Vredenborg&quot;,&quot;given&quot;:&quot;Marloes&quot;},{&quot;family&quot;:&quot;Bentvelzen&quot;,&quot;given&quot;:&quot;Marit&quot;}],&quot;accessed&quot;:{&quot;date-parts&quot;:[[&quot;2026&quot;,3,19]]},&quot;issued&quot;:{&quot;date-parts&quot;:[[&quot;2025&quot;,4,26]]}}}],&quot;schema&quot;:&quot;https://github.com/citation-style-language/schema/raw/master/csl-citation.json&quot;} RNDw59pFNV7X1"/>. Mindez arra utal, hogy a gamifikáció nemcsak motiváló, hanem pszichésen terhelő mechanizmusokat is működésbe hozhat, és a folyamatos megfelelési kényszer nemcsak az összehasonlító funkciókban, hanem más elemeknél, például a napi sorozatok fenntartására épülő rendszerekben is megjelenhet. </text:p>
      <text:p text:style-name="Bekezdes">Összességében a gamifikáció hatékony motivációs eszköz lehet, azonban fontos a negatív pszichológiai hatások minimalizálása. A versengés és az összehasonlítás egyes felhasználóknál stresszt és önértékelési problémákat okozhat, ezért célszerű olyan rendszereket kialakítani, amelyek az egyéni fejlődést is támogatják. Lényeges, hogy a felhasználók választhassanak: részt kívánnak-e versenyben, vagy inkább saját céljaikra és előrehaladásukra fókuszálnak. </text:p>
      <text:h text:style-name="Heading_20_2" text:outline-level="2"><text:bookmark-start text:name="__RefHeading___Toc15533_918428579"/>2.5. Összegzés<text:bookmark-end text:name="__RefHeading___Toc15533_918428579"/></text:h>
      <text:p text:style-name="P13"><text:span text:style-name="T22"><text:tab/></text:span>Összességében a gamifikáció jól használható eszköz a motiváció növelésére és a felhasználók bevonására, de nem minden esetben működik pozitívan. A versengés és az <text:soft-page-break/>állandó összehasonlítás könnyen vezethet stresszhez vagy negatív önértékeléshez, különösen érzékenyebb területeken. Ezért fontos, hogy a gamifikációt ne csak ösztönzésre használjuk, hanem úgy alakítsuk ki, hogy az egyéni fejlődést is támogassa. Így megőrizhető az előnye, miközben a kedvezőtlen hatások csökkenthetők. </text:p>
      <text:h text:style-name="Heading_20_1" text:outline-level="1"><text:bookmark-start text:name="__RefHeading___Toc15535_918428579"/>3. A fejlesztői környezet és <text:span text:style-name="T23">technológiák</text:span><text:bookmark-end text:name="__RefHeading___Toc15535_918428579"/></text:h>
      <text:h text:style-name="Heading_20_2" text:outline-level="2"><text:bookmark-start text:name="__RefHeading___Toc24868_918428579"/>3.1. A fejlesztői környezet áttekintése<text:bookmark-end text:name="__RefHeading___Toc24868_918428579"/></text:h>
      <text:p text:style-name="Bekezdes"><text:tab/><text:span text:style-name="T24">A</text:span><text:span text:style-name="T25">z alkalmazás</text:span><text:span text:style-name="T24"> két önálló, de szorosan együttműködő komponensre épül: egy szerveroldali backendre és egy Android-alapú mobilalkalmazásra. A két rész eltérő fejlesztői környezetben és technológiai eszközkészlet felhasználásával készült, kommunikációjuk REST-elvű JSON API-n keresztül </text:span><text:span text:style-name="T25">történik</text:span><text:span text:style-name="T24">. Ez az architektúra lehetővé teszi, hogy a backend és a frontend egymástól függetlenül fejleszthető és karbantartható legyen.</text:span></text:p>
      <text:p text:style-name="Bekezdes"><text:span text:style-name="T23">A szerveroldali komponens </text:span>fejlesztése a JetBrains PhpStorm integrált fejlesztői környezetben zajlott. A backend PHP programozási nyelven, a Laravel 12 keretrendszer felhasználásával készült, az adatok tárolását MySQL relációs adatbázis-kezelő rendszer biztosítja. A hitelesítés egyedi Bearer token alapon valósul meg, amelyet egy saját réteg ellenőriz.</text:p>
      <text:p text:style-name="Bekezdes">A mobilalkalmazás fejlesztése a Google Android Studio környezetben zajlott. A frontend Kotlin programozási nyelven íródott, a felhasználói felület kialakítása a Jetpack Compose UI-keretrendszer segítségével történt. A háttérrendszerrel való kommunikációért a Retrofit2 HTTP-kliens könyvtár és az OkHttp hálózati réteg felelős. A projekt build-konfigurációja Kotlin DSL alapú. <text:span text:style-name="T26">A</text:span> célplatform minimális API-szintje 24 a cél API-szint pedig 36.</text:p>
      <text:h text:style-name="Heading_20_2" text:outline-level="2"><text:bookmark-start text:name="__RefHeading___Toc24870_918428579"/>3.2. Backend fejlesztői környezet – PhpStorm<text:bookmark-end text:name="__RefHeading___Toc24870_918428579"/></text:h>
      <text:p text:style-name="Bekezdes"><text:tab/>A backend fejlesztéséhez használt fejlesztői környezet kiválasztásakor fontos szempont volt, hogy az eszköz megfelelő támogatást nyújtson mind a PHP nyelvhez, mind a Laravel keretrendszerhez. Erre a célra a JetBrains PhpStorm IDE bizonyult a legalkalmasabb megoldásnak, amely napjainkban a PHP-alapú webfejlesztés egyik legelterjedtebb professzionális eszköze</text:p>
      <text:p text:style-name="Bekezdes">A PhpStorm a JetBrains cég terméke, amelyet kifejezetten PHP fejlesztők számára terveztek. Az IDE legjelentősebb funkciója az intelligens kódkiegészítés, amely nemcsak az alapvető PHP szintaxist ismeri, hanem mélyen integrálódik a projekt szerkezetébe is: osztályneveket, metódusokat, változókat és egész kódsorokat képes kontextusnak megfelelően javasolni. Ez különösen hasznos összetett, keretrendszerre épülő projekteknél, ahol a kézi kódírás lassú és <text:soft-page-break/>hibalehetőségekkel teli lenne. Emellett az IDE valós idejű hibakeresési és statikus kódelemzési funkciókkal is rendelkezik, amelyek segítségével a fejlesztés során felmerülő problémák korán azonosíthatók.</text:p>
      <text:h text:style-name="Heading_20_2" text:outline-level="2"><text:bookmark-start text:name="__RefHeading___Toc24872_918428579"/>3.3. PHP programozási nyelv<text:bookmark-end text:name="__RefHeading___Toc24872_918428579"/></text:h>
      <text:h text:style-name="Heading_20_2" text:outline-level="2"><text:bookmark-start text:name="__RefHeading___Toc24874_918428579"/>3.4. Laravel keretrendszer<text:bookmark-end text:name="__RefHeading___Toc24874_918428579"/></text:h>
      <text:h text:style-name="Heading_20_2" text:outline-level="2"><text:bookmark-start text:name="__RefHeading___Toc24876_918428579"/>3.5. Hitelesítés és biztonság<text:bookmark-end text:name="__RefHeading___Toc24876_918428579"/></text:h>
      <text:h text:style-name="Heading_20_2" text:outline-level="2"><text:bookmark-start text:name="__RefHeading___Toc24878_918428579"/>3.6. Adatbázis - MySQL<text:bookmark-end text:name="__RefHeading___Toc24878_918428579"/></text:h>
      <text:h text:style-name="Heading_20_2" text:outline-level="2"><text:bookmark-start text:name="__RefHeading___Toc24880_918428579"/>3.7. Frontend fejlesztői környezet – Android Studio<text:bookmark-end text:name="__RefHeading___Toc24880_918428579"/></text:h>
      <text:h text:style-name="Heading_20_2" text:outline-level="2"><text:bookmark-start text:name="__RefHeading___Toc24882_918428579"/>3.8. Kotlin programozási nyelv<text:bookmark-end text:name="__RefHeading___Toc24882_918428579"/></text:h>
      <text:h text:style-name="Heading_20_2" text:outline-level="2"><text:bookmark-start text:name="__RefHeading___Toc24884_918428579"/>3.9. Jetpack Compose<text:bookmark-end text:name="__RefHeading___Toc24884_918428579"/></text:h>
      <text:h text:style-name="Heading_20_2" text:outline-level="2"><text:bookmark-start text:name="__RefHeading___Toc24886_918428579"/>3.10. Hálózati kommunikáció<text:bookmark-end text:name="__RefHeading___Toc24886_918428579"/></text:h>
      <text:h text:style-name="Heading_20_2" text:outline-level="2"><text:bookmark-start text:name="__RefHeading___Toc24888_918428579"/>3.11. A rendszer architektúrájának összefoglalása<text:bookmark-end text:name="__RefHeading___Toc24888_918428579"/></text:h>
      <text:h text:style-name="Heading_20_1" text:outline-level="1"><text:bookmark-start text:name="__RefHeading___Toc21098_918428579"/>4. A LvlUp! mobilalkalmazás bemutatása <text:bookmark-end text:name="__RefHeading___Toc21098_918428579"/></text:h>
      <text:h text:style-name="Heading_20_1" text:outline-level="1"><text:bookmark-start text:name="__RefHeading___Toc15537_918428579"/><text:span text:style-name="Strong_20_Emphasis"><text:span text:style-name="T27">5. </text:span></text:span><text:span text:style-name="Strong_20_Emphasis">Összefoglalás</text:span><text:bookmark-end text:name="__RefHeading___Toc15537_918428579"/></text:h>
      <text:h text:style-name="Heading_20_1" text:outline-level="1"><text:bookmark-start text:name="__RefHeading___Toc15539_918428579"/>Irodalomjegyzék<text:bookmark-end text:name="__RefHeading___Toc15539_918428579"/></text:h>
      <text:section text:style-name="Sect1" text:name="ZOTERO_BIBL {&quot;uncited&quot;:[],&quot;omitted&quot;:[],&quot;custom&quot;:[]} CSL_BIBLIOGRAPHY RNDXFASuEbu2P">
        <text:p text:style-name="Bibliography_20_1">[1]<text:tab/>P. T. Katzmarzyk, C. Friedenreich, E. J. Shiroma, és I.-M. Lee, „Physical inactivity and non-communicable disease burden in low-income, middle-income and high-income countries”, <text:span text:style-name="T28">Br. J. Sports Med.</text:span>, köt. 56, sz. 2, o. 101–106, jan. 2022, doi: 10.1136/bjsports-2020-103640.</text:p>
        <text:p text:style-name="Bibliography_20_1">[2]<text:tab/>S. J. Hardcastle, J. Hancox, A. Hattar, C. Maxwell-Smith, C. Thøgersen-Ntoumani, és M. S. Hagger, „Motivating the unmotivated: how can health behavior be changed in those unwilling to change?”, <text:span text:style-name="T28">Front. Psychol.</text:span>, köt. 6, jún. 2015, doi: 10.3389/fpsyg.2015.00835.</text:p>
        <text:p text:style-name="Bibliography_20_1">[3]<text:tab/>S. Deterding, D. Dixon, R. Khaled, és L. Nacke, „From Game Design Elements to Gamefulness: Defining »Gamification«”, in <text:span text:style-name="T28">Proceedings of the 15th International Academic MindTrek Conference: Envisioning Future Media Environments</text:span>, Proceedings of the 15th International Academic MindTrek Conference: Envisioning Future Media Environments, 2011, o. 9–15. doi: 10.1145/2181037.2181040.</text:p>
        <text:p text:style-name="Bibliography_20_1">[4]<text:tab/>E. A. Edwards <text:span text:style-name="T28">és mtsai.</text:span>, „Gamification for health promotion: systematic review of behaviour change techniques in smartphone apps”, <text:span text:style-name="T28">BMJ Open</text:span>, köt. 6, sz. 10, o. e012447, okt. 2016, doi: 10.1136/bmjopen-2016-012447.</text:p>
        <text:p text:style-name="Bibliography_20_1">[5]<text:tab/>S. Deterding, D. Dixon, R. Khaled, és L. Nacke, „From game design elements to gamefulness: defining »gamification«”, in <text:span text:style-name="T28">Proceedings of the 15th International Academic MindTrek Conference: Envisioning Future Media Environments</text:span>, Tampere Finland: ACM, szept. 2011, o. 9–15. doi: 10.1145/2181037.2181040.</text:p>
        <text:p text:style-name="Bibliography_20_1">[6]<text:tab/>S. Hallifax, M. Altmeyer, K. Kölln, M. Rauschenberger, és L. E. Nacke, „From Points to Progression: A Scoping Review of Game Elements in Gamification Research with a Content Analysis of 280 Research Papers”, <text:span text:style-name="T28">Proc. ACM Hum.-Comput. Interact.</text:span>, köt. 7, sz. CHI PLAY, o. 748–768, szept. 2023, doi: 10.1145/3611048.</text:p>
        <text:p text:style-name="Bibliography_20_1">[7]<text:tab/>J. Koivisto és J. Hamari, „The rise of motivational information systems: A review of gamification research”, <text:span text:style-name="T28">Int. J. Inf. Manag.</text:span>, köt. 45, sz. July 2018, o. 191–210, 2019, doi: 10.1016/j.ijinfomgt.2018.10.013.</text:p>
        <text:p text:style-name="Bibliography_20_1">[8]<text:tab/>M. Sailer és L. Homner, „The Gamification of Learning: a Meta-analysis”, <text:span text:style-name="T28">Educ. Psychol. Rev.</text:span>, köt. 32, sz. 1, o. 77–112, márc. 2020, doi: 10.1007/s10648-019-09498-w.</text:p>
        <text:p text:style-name="Bibliography_20_1">[9]<text:tab/>D. Johnson, S. Deterding, K.-A. A. Kuhn, A. Staneva, S. Stoyanov, és L. Hides, „Gamification for health and wellbeing: A systematic review of the literature”, <text:span text:style-name="T28">Internet Interv.</text:span>, köt. 6, o. 89–106, 2016, doi: 10.1016/j.invent.2016.10.002.</text:p>
        <text:p text:style-name="Bibliography_20_1">[10]<text:tab/>C. Almeida, M. Kalinowski, A. Uchôa, és B. Feijó, „Negative effects of gamification in education software: Systematic mapping and practitioner perceptions”, <text:span text:style-name="T28">Inf. Softw. Technol.</text:span>, köt. 156, o. 107142, 2023, doi: 10.1016/j.infsof.2022.107142.</text:p>
        <text:p text:style-name="Bibliography_20_1">[11]<text:tab/>D. Van Zandvoort, M. Vredenborg, és M. Bentvelzen, „Unhealthy Comparisons to Promote Healthy Behavior? Exploring the Impact of Social Comparison Strategies in Personal Informatics.”, in <text:span text:style-name="T28">Proceedings of the 2025 CHI Conference on Human Factors in Computing Systems</text:span>, Yokohama Japan: ACM, ápr. 2025, o. 1–21. doi: 10.1145/3706598.3713737.</text:p>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adornments="Félkövér" style:font-family-generic="roman" style:font-pitch="variable"/>
    <style:font-face style:name="Times New Roman2" svg:font-family="'Times New Roman'" style:font-adornments="Normá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hu" fo:country="H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hu" fo:country="H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master-page-name="">
      <style:paragraph-properties fo:margin-top="0.42cm" fo:margin-bottom="0.42cm" style:contextual-spacing="false" style:page-number="auto" fo:break-before="page">
        <style:tab-stops/>
      </style:paragraph-properties>
      <style:text-properties style:font-name="Times New Roman1" fo:font-family="'Times New Roman'" style:font-style-name="Félkövér" style:font-family-generic="roman" style:font-pitch="variable" fo:font-size="18pt" fo:font-weight="bold" style:font-size-asian="18pt" style:font-weight-asian="bold" style:font-size-complex="18pt" style:font-weight-complex="bold"/>
    </style:style>
    <style:style style:name="Bibliography_20_1" style:display-name="Bibliography 1" style:family="paragraph" style:parent-style-name="Index" style:class="index">
      <style:paragraph-properties fo:margin-left="0.677cm" fo:margin-top="0cm" fo:margin-bottom="0cm" style:contextual-spacing="false" style:line-height-at-least="0.423cm" fo:text-indent="-0.677cm" style:auto-text-indent="false">
        <style:tab-stops>
          <style:tab-stop style:position="0.677cm"/>
        </style:tab-stops>
      </style:paragraph-properties>
    </style:style>
    <style:style style:name="Bekezdes" style:family="paragraph" style:parent-style-name="Text_20_body">
      <style:paragraph-properties fo:margin-left="0cm" fo:margin-right="0cm" fo:margin-top="0cm" fo:margin-bottom="0.247cm" style:contextual-spacing="false" fo:line-height="150%" fo:text-align="justify" style:justify-single-word="false" fo:orphans="2" fo:widows="2" fo:text-indent="0cm" style:auto-text-indent="false"/>
      <style:text-properties fo:font-variant="normal" fo:text-transform="none" fo:color="#000000" loext:opacity="100%" style:font-name="Times New Roman" fo:font-family="'Times New Roman'" style:font-family-generic="roman" style:font-pitch="variable" fo:font-size="12pt" fo:letter-spacing="normal" fo:font-style="normal" fo:font-weight="normal"/>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Heading_20_2" style:display-name="Heading 2" style:family="paragraph" style:parent-style-name="Heading" style:next-style-name="Text_20_body" style:default-outline-level="2" style:class="chapter" style:master-page-name="">
      <style:paragraph-properties fo:margin-top="0.353cm" fo:margin-bottom="0.212cm" style:contextual-spacing="false" style:page-number="auto"/>
      <style:text-properties style:font-name="Times New Roman1" fo:font-family="'Times New Roman'" style:font-style-name="Félkövér"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text-indent="0cm" style:auto-text-indent="false" style:page-number="auto" text:number-lines="false" text:line-number="0"/>
      <style:text-properties style:font-name="Times New Roman1" fo:font-family="'Times New Roman'" style:font-style-name="Félkövér"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text-indent="0cm" style:auto-text-indent="false" style:page-number="auto">
        <style:tab-stops>
          <style:tab-stop style:position="16cm" style:type="right" style:leader-style="dotted" style:leader-text="."/>
        </style:tab-stops>
      </style:paragraph-properties>
      <style:text-properties style:font-name="Times New Roman2" fo:font-family="'Times New Roman'" style:font-style-name="Normál" style:font-family-generic="roman" style:font-pitch="variable"/>
    </style:style>
    <style:style style:name="Contents_20_2" style:display-name="Contents 2" style:family="paragraph" style:parent-style-name="Index" style:class="index">
      <style:paragraph-properties fo:margin-left="0.499cm" fo:text-indent="0cm" style:auto-text-indent="false">
        <style:tab-stops>
          <style:tab-stop style:position="15.501cm" style:type="right" style:leader-style="dotted" style:leader-text="."/>
        </style:tab-stops>
      </style:paragraph-properties>
      <style:text-properties style:font-name="Times New Roman2" fo:font-family="'Times New Roman'" style:font-style-name="Normál" style:font-family-generic="roman" style:font-pitch="variabl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Alapértelmezett oldalstílus5"/><text:page-number text:select-page="current">14</text:page-number><text:bookmark-end text:name="PageNumWizard_FOOTER_Alapértelmezett oldalstílus5"/></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7T22:12:36.246322900</meta:creation-date>
    <meta:generator>LibreOffice/26.2.1.2$Windows_X86_64 LibreOffice_project/620$Build-2</meta:generator>
    <dc:date>2026-03-19T20:23:01.543961600</dc:date>
    <meta:editing-duration>PT4H10M4S</meta:editing-duration>
    <meta:editing-cycles>44</meta:editing-cycles>
    <meta:document-statistic meta:table-count="0" meta:image-count="0" meta:object-count="0" meta:page-count="14" meta:paragraph-count="89" meta:word-count="2536" meta:character-count="20164" meta:non-whitespace-character-count="17697"/>
    <meta:user-defined meta:name="ZOTERO_PREF_1">&lt;data data-version="3" zotero-version="8.0.4"&gt;&lt;session id="bllnoWH7"/&gt;&lt;style id="http://www.zotero.org/styles/ieee" locale="hu-HU" hasBibliography="1" bibliographyStyleHasBeenSet="1"/&gt;&lt;prefs&gt;&lt;pref name="fieldType" value="ReferenceMark"/&gt;&lt;pref name="automa</meta:user-defined>
    <meta:user-defined meta:name="ZOTERO_PREF_2">ticJournalAbbreviations" value="true"/&gt;&lt;/prefs&gt;&lt;/data&gt;</meta:user-defined>
  </office:meta>
</office:document-meta>
</file>