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xygen" svg:font-family="Oxygen, sans-serif"/>
    <style:font-face style:name="Times New Roman" svg:font-family="'Times New Roman'" style:font-family-generic="roman" style:font-pitch="variable"/>
    <style:font-face style:name="Times New Roman1" svg:font-family="'Times New Roman'" style:font-adornments="Félkövér" style:font-family-generic="roman" style:font-pitch="variable"/>
  </office:font-face-decls>
  <office:automatic-styles>
    <style:style style:name="P1" style:family="paragraph" style:parent-style-name="Text_20_body">
      <style:paragraph-properties fo:text-align="center" style:justify-single-word="false"/>
      <style:text-properties officeooo:paragraph-rsid="000a2833"/>
    </style:style>
    <style:style style:name="P2" style:family="paragraph" style:parent-style-name="Text_20_body">
      <style:paragraph-properties fo:text-align="center" style:justify-single-word="false"/>
      <style:text-properties officeooo:paragraph-rsid="000a3c86"/>
    </style:style>
    <style:style style:name="P3" style:family="paragraph" style:parent-style-name="Text_20_body">
      <style:paragraph-properties fo:text-align="left" style:justify-single-word="false"/>
      <style:text-properties officeooo:paragraph-rsid="000c9068"/>
    </style:style>
    <style:style style:name="P4" style:family="paragraph" style:parent-style-name="Contents_20_1">
      <style:paragraph-properties>
        <style:tab-stops>
          <style:tab-stop style:position="15.998cm" style:type="right" style:leader-style="dotted" style:leader-text="."/>
        </style:tab-stops>
      </style:paragraph-properties>
    </style:style>
    <style:style style:name="P5" style:family="paragraph" style:parent-style-name="Contents_20_2">
      <style:paragraph-properties>
        <style:tab-stops>
          <style:tab-stop style:position="15.499cm" style:type="right" style:leader-style="dotted" style:leader-text="."/>
        </style:tab-stops>
      </style:paragraph-properties>
    </style:style>
    <style:style style:name="P6" style:family="paragraph" style:parent-style-name="Bekezdes" style:master-page-name="">
      <loext:graphic-properties draw:fill="none"/>
      <style:paragraph-properties fo:margin-left="0.3cm" fo:margin-right="0.499cm" fo:margin-top="0cm" fo:margin-bottom="0.247cm" style:contextual-spacing="false" fo:line-height="150%" fo:text-align="justify" style:justify-single-word="false" fo:orphans="2" fo:widows="2" fo:text-indent="0cm" style:auto-text-indent="false" style:page-number="auto" fo:break-before="page" fo:background-color="transparent"/>
    </style:style>
    <style:style style:name="P7" style:family="paragraph" style:parent-style-name="Bekezdes">
      <style:paragraph-properties style:writing-mode="lr-tb" style:writing-mode-automatic="false"/>
    </style:style>
    <style:style style:name="P8" style:family="paragraph" style:parent-style-name="Bekezdes">
      <style:paragraph-properties style:writing-mode="lr-tb"/>
    </style:style>
    <style:style style:name="P9" style:family="paragraph" style:parent-style-name="Bekezdes">
      <style:paragraph-properties style:writing-mode="lr-tb"/>
      <style:text-properties officeooo:paragraph-rsid="00141f38"/>
    </style:style>
    <style:style style:name="P10" style:family="paragraph" style:parent-style-name="Bekezdes">
      <style:paragraph-properties style:writing-mode="lr-tb"/>
      <style:text-properties officeooo:paragraph-rsid="0018e06a"/>
    </style:style>
    <style:style style:name="P11" style:family="paragraph" style:parent-style-name="Bekezdes">
      <style:paragraph-properties style:writing-mode="lr-tb"/>
      <style:text-properties officeooo:paragraph-rsid="0019a954"/>
    </style:style>
    <style:style style:name="P12" style:family="paragraph" style:parent-style-name="Bekezdes">
      <style:text-properties officeooo:paragraph-rsid="001ff44d"/>
    </style:style>
    <style:style style:name="P13" style:family="paragraph" style:parent-style-name="Text_20_body">
      <style:paragraph-properties fo:line-height="150%" fo:text-align="justify" style:justify-single-word="false"/>
      <style:text-properties fo:color="#000000" loext:opacity="100%" style:font-name="Times New Roman"/>
    </style:style>
    <style:style style:name="P14" style:family="paragraph" style:parent-style-name="Bekezdes">
      <style:text-properties fo:font-size="13pt" fo:font-weight="bold" officeooo:rsid="0025d7ec" officeooo:paragraph-rsid="0025d7ec" style:font-size-asian="11.3500003814697pt" style:font-weight-asian="bold" style:font-size-complex="13pt" style:font-weight-complex="bold"/>
    </style:style>
    <style:style style:name="P15" style:family="paragraph" style:parent-style-name="Bekezdes">
      <style:text-properties officeooo:paragraph-rsid="0030fc7a"/>
    </style:style>
    <style:style style:name="P16"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fo:break-before="page"/>
      <style:text-properties fo:font-variant="normal" fo:text-transform="none" fo:color="#000000" loext:opacity="100%" style:font-name="Oxygen" fo:font-size="12pt" fo:letter-spacing="normal" fo:font-style="normal" fo:font-weight="normal"/>
    </style:style>
    <style:style style:name="P17"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style:text-properties fo:font-variant="normal" fo:text-transform="none" fo:color="#000000" loext:opacity="100%" style:font-name="Oxygen" fo:font-size="12pt" fo:letter-spacing="normal" fo:font-style="normal" fo:font-weight="normal"/>
    </style:style>
    <style:style style:name="T1" style:family="text">
      <style:text-properties style:font-name="Times New Roman" fo:font-size="24pt" officeooo:rsid="000a2833" style:font-size-asian="24pt" style:font-size-complex="24pt"/>
    </style:style>
    <style:style style:name="T2" style:family="text">
      <style:text-properties style:font-name="Times New Roman" fo:font-size="24pt" fo:font-weight="normal" officeooo:rsid="000a3c86" style:font-size-asian="24pt" style:font-weight-asian="normal" style:font-size-complex="24pt" style:font-weight-complex="normal"/>
    </style:style>
    <style:style style:name="T3" style:family="text">
      <style:text-properties style:font-name="Times New Roman" fo:font-size="22pt" fo:font-weight="normal" officeooo:rsid="000c9068" style:font-size-asian="19.25pt" style:font-weight-asian="normal" style:font-size-complex="22pt" style:font-weight-complex="normal"/>
    </style:style>
    <style:style style:name="T4" style:family="text">
      <style:text-properties officeooo:rsid="0013641e"/>
    </style:style>
    <style:style style:name="T5" style:family="text">
      <style:text-properties officeooo:rsid="001dd959"/>
    </style:style>
    <style:style style:name="T6" style:family="text">
      <style:text-properties officeooo:rsid="0020fae1"/>
    </style:style>
    <style:style style:name="T7" style:family="text">
      <style:text-properties officeooo:rsid="0022f203"/>
    </style:style>
    <style:style style:name="T8" style:family="text">
      <style:text-properties fo:font-size="13pt" fo:font-weight="bold" officeooo:rsid="001ff44d" style:font-size-asian="11.3500003814697pt" style:font-weight-asian="bold" style:font-size-complex="13pt" style:font-weight-complex="bold"/>
    </style:style>
    <style:style style:name="T9" style:family="text">
      <style:text-properties officeooo:rsid="002311a6"/>
    </style:style>
    <style:style style:name="T10" style:family="text">
      <style:text-properties officeooo:rsid="00255a52"/>
    </style:style>
    <style:style style:name="T11" style:family="text">
      <style:text-properties officeooo:rsid="00258b61"/>
    </style:style>
    <style:style style:name="T12" style:family="text">
      <style:text-properties officeooo:rsid="00262e57"/>
    </style:style>
    <style:style style:name="T13" style:family="text">
      <style:text-properties fo:font-size="13pt" fo:font-weight="bold" officeooo:rsid="00264397" style:font-size-asian="11.3500003814697pt" style:font-weight-asian="bold" style:font-size-complex="13pt" style:font-weight-complex="bold"/>
    </style:style>
    <style:style style:name="T14" style:family="text">
      <style:text-properties officeooo:rsid="002c123a"/>
    </style:style>
    <style:style style:name="T15" style:family="text">
      <style:text-properties officeooo:rsid="002a1ad6"/>
    </style:style>
    <style:style style:name="T16" style:family="text">
      <style:text-properties officeooo:rsid="0027e72a"/>
    </style:style>
    <style:style style:name="T17" style:family="text">
      <style:text-properties officeooo:rsid="002d32a2"/>
    </style:style>
    <style:style style:name="T18" style:family="text">
      <style:text-properties officeooo:rsid="00331237"/>
    </style:style>
    <style:style style:name="T19" style:family="text">
      <style:text-properties fo:font-size="12pt" fo:font-weight="normal" officeooo:rsid="002ce490" style:font-size-asian="10.5pt" style:font-weight-asian="normal" style:font-size-complex="12pt" style:font-weight-complex="normal"/>
    </style:style>
    <style:style style:name="T20" style:family="text">
      <style:text-properties officeooo:rsid="0030a5c1"/>
    </style:style>
    <style:style style:name="T21" style:family="text">
      <style:text-properties fo:font-size="13pt" fo:font-weight="bold" officeooo:rsid="0030fc7a" style:font-size-asian="11.3500003814697pt" style:font-weight-asian="bold" style:font-size-complex="13pt" style:font-weight-complex="bold"/>
    </style:style>
    <style:style style:name="T22" style:family="text">
      <style:text-properties style:font-name="Times New Roman"/>
    </style:style>
    <style:style style:name="T23"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5515_918428579"/><text:span text:style-name="Strong_20_Emphasis"><text:span text:style-name="T1">DEBRECENI EGYETEM<text:line-break/> INFROMATIKAI KAR</text:span></text:span><text:bookmark-end text:name="__RefHeading___Toc15515_918428579"/></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ZAKDOLGOZAT</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2">Gamifikált fitness mobil alkalmazás</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3"><text:span text:style-name="Strong_20_Emphasis"><text:span text:style-name="T3">Témavezető: <text:s text:c="36"/>Készítette:</text:span></text:span></text:p>
      <text:p text:style-name="P3"><text:span text:style-name="Strong_20_Emphasis"><text:span text:style-name="T3">Dr. Biró Piroska <text:s text:c="30"/>Abari Gergő</text:span></text:span></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rotected="true">
            <text:p text:style-name="Contents_20_Heading"><text:soft-page-break/>Tartalomjegyzék</text:p>
          </text:index-title>
          <text:p text:style-name="P4"><text:a xlink:type="simple" xlink:href="#__RefHeading___Toc15519_918428579" office:name="Bevezetés" text:style-name="Index_20_Link" text:visited-style-name="Index_20_Link">Bevezetés<text:tab/>3</text:a></text:p>
          <text:p text:style-name="P4"><text:a xlink:type="simple" xlink:href="#__RefHeading___Toc15521_918428579" office:name="Tárgyalási rész (30-40 oldal)" text:style-name="Index_20_Link" text:visited-style-name="Index_20_Link">Tárgyalási rész (30-40 oldal)<text:tab/>5</text:a></text:p>
          <text:p text:style-name="P4"><text:a xlink:type="simple" xlink:href="#__RefHeading___Toc15523_918428579" office:name="2. A gamifikáció szerepe mobilalkalmazásokban" text:style-name="Index_20_Link" text:visited-style-name="Index_20_Link">2. A gamifikáció szerepe mobilalkalmazásokban<text:tab/>5</text:a></text:p>
          <text:p text:style-name="P5"><text:a xlink:type="simple" xlink:href="#__RefHeading___Toc15525_918428579" office:name="2.1. A gamifikáció fogalma és alapjai" text:style-name="Index_20_Link" text:visited-style-name="Index_20_Link">2.1. A gamifikáció fogalma és alapjai<text:tab/>5</text:a></text:p>
          <text:p text:style-name="P5"><text:a xlink:type="simple" xlink:href="#__RefHeading___Toc15527_918428579" office:name="2.2. A gamifikáció játékelemei és mechanizmusai" text:style-name="Index_20_Link" text:visited-style-name="Index_20_Link">2.2. A gamifikáció játékelemei és mechanizmusai<text:tab/>6</text:a></text:p>
          <text:p text:style-name="P5"><text:a xlink:type="simple" xlink:href="#__RefHeading___Toc15529_918428579" office:name="2.3. A gamifikáció hatásossága a különböző alkalmazási területeken" text:style-name="Index_20_Link" text:visited-style-name="Index_20_Link">2.3. A gamifikáció hatásossága a különböző alkalmazási területeken<text:tab/>7</text:a></text:p>
          <text:p text:style-name="P5"><text:a xlink:type="simple" xlink:href="#__RefHeading___Toc15531_918428579" office:name="2.4. A gamifikáció korlátai és kritikái" text:style-name="Index_20_Link" text:visited-style-name="Index_20_Link">2.4. A gamifikáció korlátai és kritikái<text:tab/>8</text:a></text:p>
          <text:p text:style-name="P5"><text:a xlink:type="simple" xlink:href="#__RefHeading___Toc15533_918428579" office:name="2.5. Összegzés" text:style-name="Index_20_Link" text:visited-style-name="Index_20_Link">2.5. Összegzés<text:tab/>9</text:a></text:p>
          <text:p text:style-name="P4"><text:a xlink:type="simple" xlink:href="#__RefHeading___Toc15535_918428579" office:name="3. A fejlesztői környezet és technológiák" text:style-name="Index_20_Link" text:visited-style-name="Index_20_Link">3. A fejlesztői környezet és technológiák<text:tab/>9</text:a></text:p>
          <text:p text:style-name="P4"><text:a xlink:type="simple" xlink:href="#__RefHeading___Toc15537_918428579" office:name="Összefoglalás (2-3 oldal)" text:style-name="Index_20_Link" text:visited-style-name="Index_20_Link">Összefoglalás (2-3 oldal)<text:tab/>10</text:a></text:p>
          <text:p text:style-name="P4"><text:a xlink:type="simple" xlink:href="#__RefHeading___Toc15539_918428579" office:name="Irodalomjegyzék" text:style-name="Index_20_Link" text:visited-style-name="Index_20_Link">Irodalomjegyzék<text:tab/>10</text:a></text:p>
        </text:index-body>
      </text:table-of-content>
      <text:p text:style-name="Bekezdes"/>
      <text:p text:style-name="P6"><text:span text:style-name="Strong_20_Emphasis"/></text:p>
      <text:h text:style-name="Heading_20_1" text:outline-level="1"><text:bookmark-start text:name="__RefHeading___Toc15519_918428579"/><text:span text:style-name="Strong_20_Emphasis">Bevezetés</text:span><text:bookmark-end text:name="__RefHeading___Toc15519_918428579"/></text:h>
      <text:p text:style-name="P7">Indokolja a témaválasztást, annak elméleti és gyakorlati jelentőségét, fogalmazza meg a célkitűzéseket és a vizsgálati módszereket (2-3 oldal).</text:p>
      <text:p text:style-name="P8">Napjainkban az egészséges életmód iránti érdeklődés folyamatosan növekszik. Számos kezdeményezés irányul arra, hogy valamilyen módon ösztönözzön másokat, hogy úgy éljék életüket, hogy fizikailag a legtöbbet hozzák ki magukból. A modern társadalom életvitele azonban számos olyan tényezőt hordoz magában, amelyek megnehezítik ennek gyakorlati megvalósítását. Az ülő életmód elterjedése, a rendszertelen táplálkozás, valamint a mindennapi stressz hozzájárulnak ahhoz, hogy az emberek nehezen alakítsanak ki hosszú távon fenntartható, egészségtudatos szokásokat. Az ülő életmód egészségügyi kockázata globális szinten is jelentős: egy 168 országra kiterjedő vizsgálat szerint a fizikai inaktivitás a teljes halálozás mintegy 7,2%-ához járul hozzá <text:reference-mark-start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1]<text:reference-mark-end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 Bár az egészséges életmóddal kapcsolatos információk széles körben elérhetők, ezek alkalmazása a mindennapi gyakorlatban gyakran elmarad. </text:p>
      <text:p text:style-name="P9">Az egészséges életmód kialakításának és fenntartásának egyik legnagyobb akadálya a motiváció hiánya. Sok esetben a kezdeti lelkesedés gyorsan alábbhagy, és az egyének visszatérnek korábbi szokásaikhoz. Bár számos módszer létezik egy ideális életmód támogatására, például edzéstervek és étrendek követése, vagy különböző motiváló alkalmazások, ezek gyakran nem biztosítanak elegendő visszajelzést vagy élményt a felhasználók számára. Ennek következtében a felhasználók érdeklődése csökken, és a kívánt változás nem válik tartóssá. A szakirodalom rámutat arra, hogy a motiváció hiánya mögött több tényező is állhat, például az a percepció, hogy a viselkedésváltozáshoz szükséges erőfeszítés meghaladja annak várható hasznát <text:span text:style-name="T4">.</text:span><text:reference-mark-start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text:span text:style-name="T4">[2]</text:span><text:reference-mark-end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 Emellett az egyének sokszor nem képesek tudatosan felülírni a korábban kialakult, berögződött szokásaikat, ami tovább nehezíti a változást <text:reference-mark-start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text:span text:style-name="T4">[2]</text:span><text:reference-mark-end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 A probléma megoldásához olyan módszerre van szükség, amely nemcsak támogatja a változás megkezdését, hanem annak hosszú távú fenntartásához is hozzájárul. </text:p>
      <text:p text:style-name="P8">A fenti problémák kezelésére egyre nagyobb figyelem irányul a gamifikáció alkalmazására, amely játékos elemek beépítését jelenti nem játékos környezetben <text:reference-mark-start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3]<text:reference-mark-end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 A gamifikáció célja a felhasználók motivációjának növelése, valamint a kívánt viselkedések kialakításának és <text:soft-page-break/>fenntartásának támogatása. Az egészségfejlesztés területén ez kifejezetten fontos, mivel a felhasználói elköteleződés kulcsfontosságú a hosszú távú célok elérésében. Egy átfogó elemzés rámutat arra, hogy az egészségügyi alkalmazásokban leggyakrabban alkalmazott technikák közé tartozik a visszajelzés és önmonitorozás, a célkitűzés, valamint a jutalmazás <text:reference-mark-start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4]<text:reference-mark-end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 Ezek az elemek lehetővé teszik a felhasználók számára, hogy folyamatos visszacsatolást kapjanak saját teljesítményükről, nyomon kövessék fejlődésüket, valamint motivációt nyerjenek a kitűzött célok eléréséhez. A gamifikáció alkalmazása olyan eszközt kínál, amely képes összekapcsolni a viselkedésváltozás elméleti alapjait a gyakorlati megvalósítással, ezáltal hatékonyan támogatja az egészségtudatos életmód kialakítását. </text:p>
      <text:p text:style-name="P10">A szakdolgozat<text:span text:style-name="T5">om</text:span> keretében egy ilyen gamifikációs eszközökkel bővített, egészséges életmódra ösztönző mobilalkalmazás megtervezése és fejlesztése valósul meg. Az alkalmazás lehetőséget biztosít a napi aktivitás, a táplálkozás, valamint egyéb egészséggel kapcsolatos tényezők nyomon követésére. A rendszer központi eleme a felhasználók motiválása különböző játékos megoldások segítségével, mint például pontgyűjtés, kihívások teljesítése, szintlépések és statisztikai visszajelzések. A felhasználók ezáltal nemcsak rögzíthetik adataikat, hanem folyamatos visszajelzést is kapnak fejlődésükről, ami hozzájárulhat a hosszú távú elköteleződés fenntartásához. A cél egy olyan rendszer létrehozása, amely egyszerre informatív és motiváló, ezáltal hatékonyan támogatja az egészségtudatos viselkedés kialakulását. </text:p>
      <text:p text:style-name="P11">A dolgozat elkészítése során többféle módszer kerül alkalmazásra. Az első lépés a téma elméleti megalapozása, releváns szakirodalmak feldolgozásával. Ezt követően sor kerül a hasonló célú mobilalkalmazások elemzésére, különös tekintettel azok funkcionalitására és motivációs eszközeire. A tervezési szakaszban meghatározásra kerülnek az alkalmazás fő funkciói, valamint kialakításra kerül a rendszer felépítése és felhasználói felülete. A fejlesztési fázis során megvalósításra kerül az alkalmazás működése, majd ezt követően a rendszer tesztelése történik meg, amely elsősorban a működés ellenőrzésére és a stabilitás vizsgálatára irányul </text:p>
      <text:h text:style-name="Heading_20_1" text:outline-level="1"><text:bookmark-start text:name="__RefHeading___Toc15521_918428579"/><text:span text:style-name="Strong_20_Emphasis">Tárgyalási rész (30-40 oldal)</text:span><text:bookmark-end text:name="__RefHeading___Toc15521_918428579"/></text:h>
      <text:p text:style-name="Bekezdes">Az érdemi rész tartalmát a témavezető és a hallgató(k) határozzák meg.</text:p>
      <text:p text:style-name="Bekezdes">A téma kifejtése. A hazai szakirodalom feldolgozása mellett emeli a diplomadolgozat értékét, ha a szerző külföldi forrásokra is támaszkodik. Felhívjuk a figyelmet az Internet által adott lehetőségekre, valamint a kari könyvtárban fellelhető külföldi folyóiratokra.</text:p>
      <text:h text:style-name="Heading_20_1" text:outline-level="1"><text:bookmark-start text:name="__RefHeading___Toc15523_918428579"/>2. A gamifikáció szerepe mobilalkalmazásokban<text:bookmark-end text:name="__RefHeading___Toc15523_918428579"/></text:h>
      <text:h text:style-name="Heading_20_2" text:outline-level="2"><text:bookmark-start text:name="__RefHeading___Toc15525_918428579"/>2.1. <text:span text:style-name="T6">A g</text:span><text:span text:style-name="T7">a</text:span><text:span text:style-name="T6">mifikáció fogalma és alapjai</text:span><text:bookmark-end text:name="__RefHeading___Toc15525_918428579"/></text:h>
      <text:p text:style-name="P12"><text:span text:style-name="T8"><text:tab/></text:span>A digitális technológiák fejlődésével párhuzamosan egyre nagyobb hangsúlyt kapnak azok a megoldások, amelyek a felhasználói élmény növelésé<text:span text:style-name="T7">vel próbálják</text:span> elősegíteni a motivációt és a tartós elköteleződést. Különösen a mobilalkalmazások területén figyelhető meg az a tendencia, hogy a pusztán funkcionális rendszerek helyett olyan interaktív megoldások kerülnek előtérbe, amelyek <text:span text:style-name="T7">hosszabb távon </text:span>képesek fenntartani <text:span text:style-name="T7">a felhasználó érdeklődését</text:span>. Ebben a kontextusban vált kiemelt jelentőségűvé a gamifikáció, amely a játékokból ismert elemek és mechanizmusok alkalmazásán keresztül próbálja támogatni a felhasználói aktivitást. </text:p>
      <text:p text:style-name="Bekezdes">A gamifikáció fogalmának meghatározására a szakirodalomban több megközelítés is <text:span text:style-name="T7">létezik</text:span>, azonban az egyik legszélesebb körben elfogadott definíció Deterding és munkatársai nevéhez köthető. Meghatározásuk szerint a gamifikáció „a játéktervezési elemek alkalmazása nem játékos környezetben” <text:reference-mark-start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5]<text:reference-mark-end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 Ez az értelmezés <text:span text:style-name="T7">egyértelműen</text:span> elkülöníti a gamifikációt a teljes értékű játékoktól, hangsúlyozva, hogy itt nem önálló játékok létrehozásáról van szó, hanem a játékokból ismert struktúrák, például pontozási rendszerek, szintek, kihívások vagy visszacsatolási mechanizmusok <text:span text:style-name="T7">alkalmazásáról</text:span>. </text:p>
      <text:p text:style-name="P13">A definícióból következik, hogy a gamifikáció nem azonos a teljes értékű játékokkal, hanem azok elemeinek <text:span text:style-name="T9">célszerű</text:span> alkalmazását jelenti. A hangsúly tehát nem a szórakoztatáson, hanem a felhasználói viselkedés és motiváció befolyásolásán van. A gamifikáció elsődleges célja jellemzően a felhasználói aktivitás növelése és az elköteleződés fenntartása, különösen olyan területeken, ahol a feladatok önmagukban kevésbé motiválóak.</text:p>
      <text:p text:style-name="P13">Fontos ugyanakkor, hogy a gamifikáció nem merül ki egyszerű játékelemek alkalmazásában, hanem tudatos tervezést igényel. Ennek megfelelően a következőkben érdemes részletesebben megvizsgálni a gamifikáció során alkalmazott játékelemeket és mechanizmusokat.</text:p>
      <text:h text:style-name="Heading_20_2" text:outline-level="2"><text:bookmark-start text:name="__RefHeading___Toc15527_918428579"/>2.2. A gamifikáció <text:span text:style-name="T10">játék</text:span>elemei és mechanizmusai<text:bookmark-end text:name="__RefHeading___Toc15527_918428579"/></text:h>
      <text:p text:style-name="Bekezdes"><text:tab/>A kutatások alapján számos különböző játékelem azonosítható, azonban ezek közül néhány kiemelkedően gyakran fordul elő. Ilyenek például a pontok, jelvények és ranglisták, <text:soft-page-break/>amelyek a legtöbb gamifikált rendszer alapját képezik <text:reference-mark-start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6]<text:reference-mark-end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 Ezek az elemek elsősorban jutalmazási és visszacsatolási funkciót töltenek be, lehetővé téve a felhasználó számára az előrehaladás nyomon követését és teljesítmény<text:span text:style-name="T10">e</text:span> értékelését.</text:p>
      <text:p text:style-name="Bekezdes">A játékelemek ugyanakkor nem csupán önálló <text:span text:style-name="T11">elemekként</text:span> értelmezhetők, hanem olyan strukturális <text:span text:style-name="T11">építőkockákként</text:span> is, amelyek hozzájárulnak a rendszer működésének átláthatóságához és a felhasználói élmény kialakításához. Segítségükkel meghatározhatók a célok, a szabályok, valamint az előrehaladás módjai, ezáltal támogatva a felhasználói bevonódást és a motiváció fenntartását <text:reference-mark-start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6]<text:reference-mark-end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text:p>
      <text:p text:style-name="Bekezdes">A gyakorlatban ezek az elemek különböző módon jelennek meg a mobilalkalmazásokban. Például egy fitneszalkalmazás pontokat adhat a napi lépésszám vagy edzések teljesítéséért, <text:span text:style-name="T11">vagy akár az étrend betartásáért,</text:span> míg jelvényekkel jutalmazhatja a felhasználót bizonyos mérföldkövek elérésekor, például egy heti cél teljesítése esetén. A ranglisták lehetőséget biztosítanak a felhasználók közötti összehasonlításra, ami versengést idézhet elő, és tovább növelheti az aktivitást. Emellett gyakran alkalmaznak szinteket és kihívásokat is, amelyek fejlődési utat kínálnak, valamint rövid távú célok kitűzésével segítik a felhasználók folyamatos bevonását. </text:p>
      <text:p text:style-name="Bekezdes">Összességében elmondható, hogy a játékelemek megfelelő kombinációja kulcsszerepet játszik a gamifikáció sikerességében. A jól megtervezett rendszerek nem csupán rövid távú aktivitást <text:span text:style-name="T11">eredményezhetnek</text:span>, hanem képesek hosszabb távon is fenntartani a felhasználók motivációját és elköteleződését. </text:p>
      <text:p text:style-name="P14"/>
      <text:h text:style-name="Heading_20_2" text:outline-level="2"><text:bookmark-start text:name="__RefHeading___Toc15529_918428579"/>2.3. A gamifikáció hatás<text:span text:style-name="T12">ossága a különböző alkalmazási területeken</text:span><text:bookmark-end text:name="__RefHeading___Toc15529_918428579"/></text:h>
      <text:p text:style-name="Bekezdes"><text:span text:style-name="T13"><text:tab/></text:span>A gamifikáció hatásosságát az elmúlt években számos kutatás vizsgálta különböző alkalmazási területeken. Az eredmények összességében azt mutatják, hogy a gamifikáció képes növelni a felhasználói aktivitást, motivációt és elköteleződést, ugyanakkor a hatások nem minden esetben egyértelműek. Egy átfogó szakirodalmi áttekintés, amely több száz tanulmány eredményeit elemezte, arra a következtetésre jutott, hogy bár a gamifikáció hatásai többnyire pozitív irányba mutatnak, jelentős arányban jelennek meg vegyes vagy korlátozott eredmények is <text:reference-mark-start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7]<text:reference-mark-end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text:p>
      <text:p text:style-name="Bekezdes"><text:soft-page-break/>A különböző alkalmazási területek közül kiemelhető az oktatás <text:span text:style-name="T14">és </text:span><text:span text:style-name="T15">az egészségügyi</text:span> <text:s/>szolgáltatások. Az oktatásban a gamifikáció alkalmazásának egyik fő célja a tanuló bevon<text:span text:style-name="T15">ásának</text:span> növelése és a tanulási folyamat élményszerűbbé tétele. A játékos elem<text:span text:style-name="T16">ek </text:span>hozzájárulhatnak ahhoz, hogy a tanulók aktívabban vegyenek részt a feladatokban, azonban a tanulmányi teljesítményre gyakorolt hatás sok esetben csak mérsékelt mértékű <text:reference-mark-start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8]<text:reference-mark-end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 </text:p>
      <text:p text:style-name="Bekezdes">Az egészségügyi és életmód-támogató alkalmazások esetében a gamifikáció főként a viselkedésváltozás segítésében jelenik meg. A játékos elemek, mint a jutalmak, szintek vagy visszajelzések, támogathatják a felhasználókat abban, hogy <text:span text:style-name="T14">rendszeresen</text:span> végezzenek egészségmegőrző tevékenységeket, például növeljék fizikai aktivitásukat. A kutatások ezen a területen is többnyire pozitív hatásokat mutatnak, különösen a viselkedés szintjén, ugyanakkor gyakoriak a vegyes eredmények is. Ez arra utal, hogy a gamifikáció hatásossága nagyban függ az alkalmazás módjától és a célcsoporttól <text:reference-mark-start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9]<text:reference-mark-end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text:p>
      <text:p text:style-name="Bekezdes">Összességében elmondható, hogy a gamifikáció hatásossága kontextusfüggő. Bár a kutatások többsége pozitív hatásokról számol be, különösen a felhasználói aktivitás és bevonódás terén, az eredmények nem minden esetben egyértelműek <text:reference-mark-start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7]<text:reference-mark-end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 A hatás mértékét jelentősen befolyásolja az alkalmazott játékelemek típusa, azok megvalósítása, valamint a célcsoport jellemzői. Ennek alapján a gamifikáció nem tekinthető univerzálisan hatékony megoldásnak, hanem olyan eszköznek, amely megfelelő tervezés mellett képes támogatni a motivációt és a viselkedésváltozást. </text:p>
      <text:h text:style-name="Heading_20_2" text:outline-level="2"><text:bookmark-start text:name="__RefHeading___Toc15531_918428579"/>2.<text:span text:style-name="T17">4</text:span>. A gami<text:span text:style-name="T18">f</text:span>ikáció korlátai és kritikái<text:bookmark-end text:name="__RefHeading___Toc15531_918428579"/></text:h>
      <text:p text:style-name="Bekezdes"><text:span text:style-name="T19"><text:tab/></text:span>Az eddigiekben a gamifikáció pozitív oldalát vizsgáltuk, azonban mint minden megközelítésnek, ennek is vannak korlátai és kedvezőtlen hatásai. Bár a gamifikációt gyakran a felhasználói motiváció növelésének és az elköteleződés erősítésének hatékony eszközeként tartják számon, a kutatások rámutatnak arra, hogy alkalmazása nem minden esetben vezet a kívánt eredményekhez <text:reference-mark-start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10]<text:reference-mark-end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 Bizonyos helyzetekben kifejezetten negatív következmények is megjelenhetnek, amelyek sokszor nem szándékoltak, és csak a rendszer használata során válnak láthatóvá. Ezért a gamifikáció értékelésekor nem elegendő kizárólag a pozitív hatásokra koncentrálni, hanem szükséges figyelembe venni annak korlátait és lehetséges kockázatait is.</text:p>
      <text:p text:style-name="Bekezdes"><text:soft-page-break/>A kutatások több konkrét negatív hatást is azonosítottak a gamifikáció alkalmazásával kapcsolatban. Gyakran jelentkeznek motivációs problémák, például a kezdeti érdeklődés csökkenése vagy a külső jutalmak túlhangsúlyozása. Emellett a játékos elemek elterelhetik a figyelmet a tanulási vagy feladatvégzési célról, ami a megértés romlásához vezethet. További gyakori probléma a rendszer kijátszása, amikor a felhasználók nem a kívánt viselkedést követik, hanem a jutalmazási mechanizmusok kihasználására törekednek <text:reference-mark-start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10]<text:reference-mark-end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 </text:p>
      <text:p text:style-name="Bekezdes">A gamifikáció negatív hatásai között kiemelt szerepet kap a felhasználók közötti folyamatos összehasonlítás is. A különböző ranglisták, és megosztott teljesítményadatok ugyan ösztönözhetik az aktivitást, ugyanakkor <text:span text:style-name="T20">negatív</text:span> pszichológiai következményekkel is járhatnak. A kutatások szerint a másokhoz való viszonyítás negatív önértékelést, bizonytalanságot, frusztrációt és önbizalomcsökkenést <text:span text:style-name="T20">okozhat</text:span>, különösen akkor, ha a felhasználó nála jobban teljesítő személyekhez méri magát <text:reference-mark-start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11]<text:reference-mark-end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 Ez a hatás még erősebben jelentkezhet érzékenyebb adatok esetén, például testzsírszázalékhoz vagy más testi jellemzőkhöz kapcsolódó összehasonlításoknál, amelyek szégyenérzetet vagy fokozott önkritikát is kiválthatnak <text:reference-mark-start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11]<text:reference-mark-end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 Mindez arra utal, hogy a gamifikáció nemcsak motiváló, hanem pszichésen terhelő mechanizmusokat is működésbe hozhat, és a folyamatos megfelelési kényszer nemcsak az összehasonlító funkciókban, hanem más elemeknél, például a napi sorozatok fenntartására épülő rendszerekben is megjelenhet. </text:p>
      <text:p text:style-name="Bekezdes">Összességében a gamifikáció hatékony motivációs eszköz lehet, azonban fontos a negatív pszichológiai hatások minimalizálása. A versengés és az összehasonlítás egyes felhasználóknál stresszt és önértékelési problémákat okozhat, ezért célszerű olyan rendszereket kialakítani, amelyek az egyéni fejlődést is támogatják. Lényeges, hogy a felhasználók választhassanak: részt kívánnak-e versenyben, vagy inkább saját céljaikra és előrehaladásukra fókuszálnak. </text:p>
      <text:h text:style-name="Heading_20_2" text:outline-level="2"><text:bookmark-start text:name="__RefHeading___Toc15533_918428579"/>2.5. Összegzés<text:bookmark-end text:name="__RefHeading___Toc15533_918428579"/></text:h>
      <text:p text:style-name="P15"><text:span text:style-name="T21"><text:tab/></text:span>Összességében a gamifikáció jól használható eszköz a motiváció növelésére és a felhasználók bevonására, de nem minden esetben működik pozitívan. A versengés és az állandó összehasonlítás könnyen vezethet stresszhez vagy negatív önértékeléshez, különösen érzékenyebb területeken. Ezért fontos, hogy a gamifikációt ne csak ösztönzésre használjuk, <text:soft-page-break/>hanem úgy alakítsuk ki, hogy az egyéni fejlődést is támogassa. Így megőrizhető az előnye, miközben a kedvezőtlen hatások csökkenthetők. </text:p>
      <text:h text:style-name="Heading_20_1" text:outline-level="1"><text:bookmark-start text:name="__RefHeading___Toc15535_918428579"/>3. A fejlesztői környezet és <text:span text:style-name="T22">technológiák</text:span><text:bookmark-end text:name="__RefHeading___Toc15535_918428579"/></text:h>
      <text:h text:style-name="Heading_20_1" text:outline-level="1">4. A LvlUp! mobilalkalmazás bemutatása </text:h>
      <text:p text:style-name="P16"/>
      <text:p text:style-name="Standard"/>
      <text:h text:style-name="Heading_20_1" text:outline-level="1"><text:bookmark-start text:name="__RefHeading___Toc15537_918428579"/><text:span text:style-name="Strong_20_Emphasis">Összefoglalás (2-3 oldal)</text:span><text:bookmark-end text:name="__RefHeading___Toc15537_918428579"/></text:h>
      <text:p text:style-name="P17">Röviden, tömören és világosan ismertetni kell a fontosabb megállapításokat és következtetéseket. Bátran és egyértelműen közölni kell, ha valamely célkitűzést nem sikerült megvalósítani. (Megfelelő indoklás mellett ez egyáltalán nem csökkenti a diplomadolgozat értékét!)</text:p>
      <text:p text:style-name="Standard"/>
      <text:p text:style-name="Standard"/>
      <text:h text:style-name="Heading_20_1" text:outline-level="1"><text:bookmark-start text:name="__RefHeading___Toc15539_918428579"/>Irodalomjegyzék<text:bookmark-end text:name="__RefHeading___Toc15539_918428579"/></text:h>
      <text:section text:style-name="Sect1" text:name="ZOTERO_BIBL {&quot;uncited&quot;:[],&quot;omitted&quot;:[],&quot;custom&quot;:[]} CSL_BIBLIOGRAPHY RNDXFASuEbu2P">
        <text:p text:style-name="Bibliography_20_1">[1]<text:tab/>P. T. Katzmarzyk, C. Friedenreich, E. J. Shiroma, és I.-M. Lee, „Physical inactivity and non-communicable disease burden in low-income, middle-income and high-income countries”, <text:span text:style-name="T23">Br. J. Sports Med.</text:span>, köt. 56, sz. 2, o. 101–106, jan. 2022, doi: 10.1136/bjsports-2020-103640.</text:p>
        <text:p text:style-name="Bibliography_20_1">[2]<text:tab/>S. J. Hardcastle, J. Hancox, A. Hattar, C. Maxwell-Smith, C. Thøgersen-Ntoumani, és M. S. Hagger, „Motivating the unmotivated: how can health behavior be changed in those unwilling to change?”, <text:span text:style-name="T23">Front. Psychol.</text:span>, köt. 6, jún. 2015, doi: 10.3389/fpsyg.2015.00835.</text:p>
        <text:p text:style-name="Bibliography_20_1">[3]<text:tab/>S. Deterding, D. Dixon, R. Khaled, és L. Nacke, „From Game Design Elements to Gamefulness: Defining »Gamification«”, in <text:span text:style-name="T23">Proceedings of the 15th International Academic MindTrek Conference: Envisioning Future Media Environments</text:span>, Proceedings of the 15th International Academic MindTrek Conference: Envisioning Future Media Environments, 2011, o. 9–15. doi: 10.1145/2181037.2181040.</text:p>
        <text:p text:style-name="Bibliography_20_1">[4]<text:tab/>E. A. Edwards <text:span text:style-name="T23">és mtsai.</text:span>, „Gamification for health promotion: systematic review of behaviour change techniques in smartphone apps”, <text:span text:style-name="T23">BMJ Open</text:span>, köt. 6, sz. 10, o. e012447, okt. 2016, doi: 10.1136/bmjopen-2016-012447.</text:p>
        <text:p text:style-name="Bibliography_20_1">[5]<text:tab/>S. Deterding, D. Dixon, R. Khaled, és L. Nacke, „From game design elements to gamefulness: defining »gamification«”, in <text:span text:style-name="T23">Proceedings of the 15th International Academic MindTrek Conference: Envisioning Future Media Environments</text:span>, Tampere Finland: ACM, szept. 2011, o. 9–15. doi: 10.1145/2181037.2181040.</text:p>
        <text:p text:style-name="Bibliography_20_1">[6]<text:tab/>S. Hallifax, M. Altmeyer, K. Kölln, M. Rauschenberger, és L. E. Nacke, „From Points to Progression: A Scoping Review of Game Elements in Gamification Research with a Content Analysis of 280 Research Papers”, <text:span text:style-name="T23">Proc. ACM Hum.-Comput. Interact.</text:span>, köt. 7, sz. CHI PLAY, o. 748–768, szept. 2023, doi: 10.1145/3611048.</text:p>
        <text:p text:style-name="Bibliography_20_1">[7]<text:tab/>J. Koivisto és J. Hamari, „The rise of motivational information systems: A review of gamification research”, <text:span text:style-name="T23">Int. J. Inf. Manag.</text:span>, köt. 45, sz. July 2018, o. 191–210, 2019, doi: 10.1016/j.ijinfomgt.2018.10.013.</text:p>
        <text:p text:style-name="Bibliography_20_1">[8]<text:tab/>M. Sailer és L. Homner, „The Gamification of Learning: a Meta-analysis”, <text:span text:style-name="T23">Educ. Psychol. Rev.</text:span>, köt. 32, sz. 1, o. 77–112, márc. 2020, doi: 10.1007/s10648-019-09498-w.</text:p>
        <text:p text:style-name="Bibliography_20_1">[9]<text:tab/>D. Johnson, S. Deterding, K.-A. A. Kuhn, A. Staneva, S. Stoyanov, és L. Hides, „Gamification for health and wellbeing: A systematic review of the literature”, <text:span text:style-name="T23">Internet Interv.</text:span>, köt. 6, o. 89–106, 2016, doi: 10.1016/j.invent.2016.10.002.</text:p>
        <text:p text:style-name="Bibliography_20_1">[10]<text:tab/>C. Almeida, M. Kalinowski, A. Uchôa, és B. Feijó, „Negative effects of gamification in education software: Systematic mapping and practitioner perceptions”, <text:span text:style-name="T23">Inf. Softw. Technol.</text:span>, köt. 156, o. 107142, 2023, doi: 10.1016/j.infsof.2022.107142.</text:p>
        <text:p text:style-name="Bibliography_20_1">[11]<text:tab/>D. Van Zandvoort, M. Vredenborg, és M. Bentvelzen, „Unhealthy Comparisons to Promote Healthy Behavior? Exploring the Impact of Social Comparison Strategies in Personal Informatics.”, in <text:span text:style-name="T23">Proceedings of the 2025 CHI Conference on Human Factors in Computing Systems</text:span>, Yokohama Japan: ACM, ápr. 2025, o. 1–21. doi: 10.1145/3706598.3713737.</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xygen" svg:font-family="Oxygen, sans-serif"/>
    <style:font-face style:name="Times New Roman" svg:font-family="'Times New Roman'" style:font-family-generic="roman" style:font-pitch="variable"/>
    <style:font-face style:name="Times New Roman1" svg:font-family="'Times New Roman'" style:font-adornments="Félkövé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style:font-name="Times New Roman1" fo:font-family="'Times New Roman'" style:font-style-name="Félkövér" style:font-family-generic="roman" style:font-pitch="variable" fo:font-size="18pt" fo:font-weight="bold" style:font-size-asian="18pt" style:font-weight-asian="bold" style:font-size-complex="18pt" style:font-weight-complex="bold"/>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Bekezdes"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style:text-properties fo:font-variant="normal" fo:text-transform="none" fo:color="#000000" loext:opacity="100%" style:font-name="Times New Roman" fo:font-family="'Times New Roman'" style:font-family-generic="roman" style:font-pitch="variable" fo:font-size="12pt" fo:letter-spacing="normal"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style:font-name="Times New Roman1" fo:font-family="'Times New Roman'" style:font-style-name="Félkövér"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indent="0cm" style:auto-text-indent="false" style:page-number="auto" text:number-lines="false" text:line-number="0"/>
      <style:text-properties style:font-name="Times New Roman1" fo:font-family="'Times New Roman'" style:font-style-name="Félkövér"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Alapértelmezett oldalstílus5"/><text:page-number text:select-page="current">17</text:page-number><text:bookmark-end text:name="PageNumWizard_FOOTER_Alapértelmezett oldalstílus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22:12:36.246322900</meta:creation-date>
    <meta:generator>LibreOffice/26.2.1.2$Windows_X86_64 LibreOffice_project/620$Build-2</meta:generator>
    <dc:date>2026-03-19T17:44:18.636003300</dc:date>
    <meta:editing-duration>PT3H18M53S</meta:editing-duration>
    <meta:editing-cycles>30</meta:editing-cycles>
    <meta:document-statistic meta:table-count="0" meta:image-count="0" meta:object-count="0" meta:page-count="16" meta:paragraph-count="67" meta:word-count="2258" meta:character-count="18017" meta:non-whitespace-character-count="15745"/>
    <meta:user-defined meta:name="ZOTERO_PREF_1">&lt;data data-version="3" zotero-version="8.0.4"&gt;&lt;session id="bllnoWH7"/&gt;&lt;style id="http://www.zotero.org/styles/ieee" locale="hu-HU" hasBibliography="1" bibliographyStyleHasBeenSet="1"/&gt;&lt;prefs&gt;&lt;pref name="fieldType" value="ReferenceMark"/&gt;&lt;pref name="automa</meta:user-defined>
    <meta:user-defined meta:name="ZOTERO_PREF_2">ticJournalAbbreviations" value="true"/&gt;&lt;/prefs&gt;&lt;/data&gt;</meta:user-defined>
  </office:meta>
</office:document-meta>
</file>